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3000002AC12D31D6BAFB1756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21df40" officeooo:paragraph-rsid="0021df40"/>
    </style:style>
    <style:style style:name="P2" style:family="paragraph" style:parent-style-name="Text_20_body">
      <style:paragraph-properties fo:text-align="start" style:justify-single-word="false"/>
      <style:text-properties officeooo:rsid="0021df40" officeooo:paragraph-rsid="0021df40"/>
    </style:style>
    <style:style style:name="P3" style:family="paragraph" style:parent-style-name="Text_20_body">
      <style:text-properties officeooo:paragraph-rsid="00250aab"/>
    </style:style>
    <style:style style:name="P4" style:family="paragraph" style:parent-style-name="Standard">
      <style:text-properties officeooo:paragraph-rsid="00250aab"/>
    </style:style>
    <style:style style:name="P5" style:family="paragraph" style:parent-style-name="Text_20_body">
      <style:paragraph-properties fo:text-align="start" style:justify-single-word="false"/>
      <style:text-properties officeooo:rsid="0022497e" officeooo:paragraph-rsid="0021df40"/>
    </style:style>
    <style:style style:name="P6" style:family="paragraph" style:parent-style-name="Text_20_body">
      <style:text-properties officeooo:rsid="0022497e" officeooo:paragraph-rsid="0024da68"/>
    </style:style>
    <style:style style:name="P7" style:family="paragraph" style:parent-style-name="Text_20_body">
      <style:paragraph-properties fo:text-align="center" style:justify-single-word="false"/>
      <style:text-properties officeooo:rsid="00204b1d" officeooo:paragraph-rsid="00204b1d"/>
    </style:style>
    <style:style style:name="P8" style:family="paragraph" style:parent-style-name="Title">
      <style:text-properties style:text-underline-style="solid" style:text-underline-width="auto" style:text-underline-color="font-color" officeooo:rsid="00204b1d" officeooo:paragraph-rsid="00204b1d"/>
    </style:style>
    <style:style style:name="P9" style:family="paragraph" style:parent-style-name="Text_20_body">
      <style:paragraph-properties fo:text-align="center" style:justify-single-word="false"/>
      <style:text-properties style:text-underline-style="solid" style:text-underline-width="auto" style:text-underline-color="font-color" officeooo:rsid="00204b1d" officeooo:paragraph-rsid="00204b1d"/>
    </style:style>
    <style:style style:name="P10" style:family="paragraph" style:parent-style-name="Text_20_body">
      <style:paragraph-properties fo:text-align="center" style:justify-single-word="false"/>
      <style:text-properties style:text-underline-style="solid" style:text-underline-width="auto" style:text-underline-color="font-color" officeooo:rsid="0026cb5b" officeooo:paragraph-rsid="0026cb5b"/>
    </style:style>
    <style:style style:name="P11" style:family="paragraph" style:parent-style-name="Text_20_body">
      <style:text-properties officeooo:rsid="002a268d" officeooo:paragraph-rsid="002a268d"/>
    </style:style>
    <style:style style:name="P12" style:family="paragraph" style:parent-style-name="Text_20_body">
      <style:text-properties officeooo:rsid="00964db9" officeooo:paragraph-rsid="00964db9"/>
    </style:style>
    <style:style style:name="P13" style:family="paragraph" style:parent-style-name="Text_20_body">
      <style:text-properties officeooo:rsid="002ba7bd" officeooo:paragraph-rsid="002ba7bd"/>
    </style:style>
    <style:style style:name="P14" style:family="paragraph" style:parent-style-name="Text_20_body">
      <style:text-properties officeooo:rsid="00c88edc" officeooo:paragraph-rsid="00c88edc" fo:background-color="#ffff00"/>
    </style:style>
    <style:style style:name="P15" style:family="paragraph" style:parent-style-name="Standard">
      <style:text-properties officeooo:paragraph-rsid="002a2dab"/>
    </style:style>
    <style:style style:name="P16" style:family="paragraph" style:parent-style-name="Standard">
      <style:text-properties officeooo:paragraph-rsid="0030d92e"/>
    </style:style>
    <style:style style:name="P17" style:family="paragraph" style:parent-style-name="Standard">
      <style:text-properties officeooo:paragraph-rsid="0031e192"/>
    </style:style>
    <style:style style:name="P18" style:family="paragraph" style:parent-style-name="Text_20_body">
      <style:text-properties officeooo:paragraph-rsid="0031e192"/>
    </style:style>
    <style:style style:name="P19" style:family="paragraph" style:parent-style-name="Standard">
      <style:text-properties officeooo:paragraph-rsid="003428a7"/>
    </style:style>
    <style:style style:name="P20" style:family="paragraph" style:parent-style-name="Text_20_body">
      <style:paragraph-properties fo:text-align="center" style:justify-single-word="false"/>
      <style:text-properties officeooo:rsid="0026cb5b" officeooo:paragraph-rsid="0026cb5b"/>
    </style:style>
    <style:style style:name="P21" style:family="paragraph" style:parent-style-name="Text_20_body">
      <style:text-properties officeooo:rsid="0026cb5b" officeooo:paragraph-rsid="00204b1d"/>
    </style:style>
    <style:style style:name="P22" style:family="paragraph" style:parent-style-name="Text_20_body">
      <style:text-properties officeooo:rsid="002a2dab" officeooo:paragraph-rsid="003428a7"/>
    </style:style>
    <style:style style:name="P23" style:family="paragraph" style:parent-style-name="Standard">
      <style:text-properties officeooo:rsid="002a2dab" officeooo:paragraph-rsid="003428a7"/>
    </style:style>
    <style:style style:name="P24" style:family="paragraph" style:parent-style-name="Standard">
      <style:text-properties officeooo:rsid="002a2dab" officeooo:paragraph-rsid="0030d92e"/>
    </style:style>
    <style:style style:name="P25" style:family="paragraph" style:parent-style-name="Text_20_body">
      <style:text-properties officeooo:rsid="002f48f5" officeooo:paragraph-rsid="002f48f5"/>
    </style:style>
    <style:style style:name="P26" style:family="paragraph" style:parent-style-name="Text_20_body">
      <style:text-properties officeooo:rsid="0036519c" officeooo:paragraph-rsid="0036519c"/>
    </style:style>
    <style:style style:name="P27" style:family="paragraph" style:parent-style-name="Text_20_body">
      <style:text-properties fo:font-weight="bold" officeooo:rsid="00cc902f" officeooo:paragraph-rsid="00cc902f" style:font-weight-asian="bold" style:font-weight-complex="bold"/>
    </style:style>
    <style:style style:name="P28" style:family="paragraph" style:parent-style-name="Text_20_body">
      <style:text-properties fo:font-weight="bold" officeooo:rsid="00d4b0fb" officeooo:paragraph-rsid="00d4b0fb" style:font-weight-asian="bold" style:font-weight-complex="bold"/>
    </style:style>
    <style:style style:name="P29" style:family="paragraph" style:parent-style-name="Text_20_body">
      <style:text-properties fo:font-weight="bold" officeooo:rsid="00d62c43" officeooo:paragraph-rsid="00d62c43" style:font-weight-asian="bold" style:font-weight-complex="bold"/>
    </style:style>
    <style:style style:name="P30" style:family="paragraph" style:parent-style-name="Text_20_body">
      <style:text-properties fo:font-weight="bold" officeooo:rsid="00d9d348" officeooo:paragraph-rsid="00d9d348" style:font-weight-asian="bold" style:font-weight-complex="bold"/>
    </style:style>
    <style:style style:name="P31" style:family="paragraph" style:parent-style-name="Text_20_body">
      <style:text-properties fo:font-weight="bold" officeooo:rsid="00dabda6" officeooo:paragraph-rsid="00dabda6" style:font-weight-asian="bold" style:font-weight-complex="bold"/>
    </style:style>
    <style:style style:name="P32" style:family="paragraph" style:parent-style-name="Text_20_body">
      <style:text-properties fo:font-weight="bold" officeooo:rsid="00dc4519" officeooo:paragraph-rsid="00dc4519" style:font-weight-asian="bold" style:font-weight-complex="bold"/>
    </style:style>
    <style:style style:name="P33" style:family="paragraph" style:parent-style-name="Text_20_body">
      <style:text-properties fo:font-weight="bold" officeooo:rsid="00de3e25" officeooo:paragraph-rsid="00de3e25" style:font-weight-asian="bold" style:font-weight-complex="bold"/>
    </style:style>
    <style:style style:name="P34" style:family="paragraph" style:parent-style-name="Text_20_body">
      <style:text-properties fo:font-weight="bold" officeooo:rsid="00e0e48b" officeooo:paragraph-rsid="00e0e48b" style:font-weight-asian="bold" style:font-weight-complex="bold"/>
    </style:style>
    <style:style style:name="P35" style:family="paragraph" style:parent-style-name="Text_20_body">
      <style:text-properties fo:font-weight="bold" officeooo:rsid="00e2751d" officeooo:paragraph-rsid="00e2751d" style:font-weight-asian="bold" style:font-weight-complex="bold"/>
    </style:style>
    <style:style style:name="P36" style:family="paragraph" style:parent-style-name="Text_20_body">
      <style:text-properties fo:font-weight="bold" officeooo:rsid="00e3a246" officeooo:paragraph-rsid="00e3a246" style:font-weight-asian="bold" style:font-weight-complex="bold"/>
    </style:style>
    <style:style style:name="P37" style:family="paragraph" style:parent-style-name="Text_20_body">
      <style:text-properties fo:font-weight="bold" officeooo:rsid="00e3b1ce" officeooo:paragraph-rsid="00e3b1ce" style:font-weight-asian="bold" style:font-weight-complex="bold"/>
    </style:style>
    <style:style style:name="P38" style:family="paragraph" style:parent-style-name="Text_20_body">
      <style:text-properties fo:font-weight="bold" officeooo:rsid="00e4a466" officeooo:paragraph-rsid="00e4a466" style:font-weight-asian="bold" style:font-weight-complex="bold"/>
    </style:style>
    <style:style style:name="P39" style:family="paragraph" style:parent-style-name="Text_20_body">
      <style:text-properties fo:font-weight="bold" officeooo:rsid="00e6683a" officeooo:paragraph-rsid="00e6683a" style:font-weight-asian="bold" style:font-weight-complex="bold"/>
    </style:style>
    <style:style style:name="P40" style:family="paragraph" style:parent-style-name="Text_20_body">
      <style:text-properties fo:font-weight="bold" officeooo:rsid="00e6f207" officeooo:paragraph-rsid="00e6f207" style:font-weight-asian="bold" style:font-weight-complex="bold"/>
    </style:style>
    <style:style style:name="P41" style:family="paragraph" style:parent-style-name="Text_20_body">
      <style:text-properties fo:font-weight="bold" officeooo:rsid="00eb13d1" officeooo:paragraph-rsid="00eb13d1" style:font-weight-asian="bold" style:font-weight-complex="bold"/>
    </style:style>
    <style:style style:name="P42" style:family="paragraph" style:parent-style-name="Text_20_body">
      <style:text-properties fo:font-weight="bold" officeooo:rsid="00eba6b0" officeooo:paragraph-rsid="00eba6b0" style:font-weight-asian="bold" style:font-weight-complex="bold"/>
    </style:style>
    <style:style style:name="P43" style:family="paragraph" style:parent-style-name="Text_20_body">
      <style:text-properties fo:font-weight="bold" officeooo:rsid="00eeea77" officeooo:paragraph-rsid="00eeea77" style:font-weight-asian="bold" style:font-weight-complex="bold"/>
    </style:style>
    <style:style style:name="P44" style:family="paragraph" style:parent-style-name="Text_20_body">
      <style:text-properties fo:font-weight="normal" officeooo:rsid="0038e5d0" officeooo:paragraph-rsid="003d7f74" style:font-weight-asian="normal" style:font-weight-complex="normal"/>
    </style:style>
    <style:style style:name="P45" style:family="paragraph" style:parent-style-name="Text_20_body">
      <style:text-properties fo:font-weight="normal" officeooo:rsid="00cc902f" officeooo:paragraph-rsid="00cc902f" style:font-weight-asian="normal" style:font-weight-complex="normal"/>
    </style:style>
    <style:style style:name="P46" style:family="paragraph" style:parent-style-name="Text_20_body">
      <style:text-properties officeooo:rsid="0038e5d0" officeooo:paragraph-rsid="003d7f74"/>
    </style:style>
    <style:style style:name="P47" style:family="paragraph" style:parent-style-name="Text_20_body">
      <style:text-properties officeooo:rsid="0044b38f" officeooo:paragraph-rsid="0044b38f"/>
    </style:style>
    <style:style style:name="P48" style:family="paragraph" style:parent-style-name="Text_20_body">
      <style:text-properties officeooo:paragraph-rsid="004965d3"/>
    </style:style>
    <style:style style:name="P49" style:family="paragraph" style:parent-style-name="Text_20_body">
      <style:text-properties officeooo:rsid="004a499a" officeooo:paragraph-rsid="004a499a"/>
    </style:style>
    <style:style style:name="P50" style:family="paragraph" style:parent-style-name="Text_20_body">
      <style:text-properties officeooo:paragraph-rsid="004a499a"/>
    </style:style>
    <style:style style:name="P51" style:family="paragraph" style:parent-style-name="Text_20_body">
      <style:text-properties officeooo:rsid="008a70d2" officeooo:paragraph-rsid="008a70d2"/>
    </style:style>
    <style:style style:name="P52" style:family="paragraph" style:parent-style-name="Text_20_body">
      <style:text-properties officeooo:rsid="008c2825" officeooo:paragraph-rsid="008c2825"/>
    </style:style>
    <style:style style:name="P53" style:family="paragraph" style:parent-style-name="Text_20_body">
      <style:text-properties officeooo:rsid="008d73f6" officeooo:paragraph-rsid="008d73f6"/>
    </style:style>
    <style:style style:name="P54" style:family="paragraph" style:parent-style-name="Text_20_body">
      <style:text-properties officeooo:rsid="008dc300" officeooo:paragraph-rsid="008dc300"/>
    </style:style>
    <style:style style:name="P55" style:family="paragraph" style:parent-style-name="Text_20_body">
      <style:text-properties officeooo:rsid="00916051" officeooo:paragraph-rsid="00a0e569"/>
    </style:style>
    <style:style style:name="P56" style:family="paragraph" style:parent-style-name="Text_20_body">
      <style:text-properties fo:color="#000000" loext:opacity="100%" officeooo:rsid="00964db9" officeooo:paragraph-rsid="00964db9" fo:background-color="transparent"/>
    </style:style>
    <style:style style:name="P57" style:family="paragraph" style:parent-style-name="Text_20_body">
      <style:text-properties fo:color="#000000" loext:opacity="100%" officeooo:rsid="00990758" officeooo:paragraph-rsid="00990758" fo:background-color="transparent"/>
    </style:style>
    <style:style style:name="P58" style:family="paragraph" style:parent-style-name="Text_20_body">
      <style:text-properties fo:color="#000000" loext:opacity="100%" officeooo:rsid="009f0c0b" officeooo:paragraph-rsid="009f0c0b" fo:background-color="transparent"/>
    </style:style>
    <style:style style:name="P59" style:family="paragraph" style:parent-style-name="Text_20_body">
      <style:text-properties fo:color="#000000" loext:opacity="100%" officeooo:rsid="00ac64b7" officeooo:paragraph-rsid="00ac64b7" fo:background-color="transparent"/>
    </style:style>
    <style:style style:name="P60" style:family="paragraph" style:parent-style-name="Text_20_body">
      <style:text-properties fo:color="#000000" loext:opacity="100%" officeooo:rsid="00adcad9" officeooo:paragraph-rsid="00adcad9" fo:background-color="transparent"/>
    </style:style>
    <style:style style:name="P61" style:family="paragraph" style:parent-style-name="Text_20_body">
      <style:text-properties fo:color="#000000" loext:opacity="100%" officeooo:rsid="00ae828e" officeooo:paragraph-rsid="00ae828e" fo:background-color="transparent"/>
    </style:style>
    <style:style style:name="P62" style:family="paragraph" style:parent-style-name="Text_20_body">
      <style:text-properties fo:color="#000000" loext:opacity="100%" officeooo:rsid="00affa02" officeooo:paragraph-rsid="00affa02" fo:background-color="transparent"/>
    </style:style>
    <style:style style:name="P63" style:family="paragraph" style:parent-style-name="Text_20_body">
      <style:text-properties officeooo:rsid="00b1e885" officeooo:paragraph-rsid="00b1e885" fo:background-color="transparent"/>
    </style:style>
    <style:style style:name="P64" style:family="paragraph" style:parent-style-name="Text_20_body">
      <style:text-properties officeooo:rsid="00b3bf04" officeooo:paragraph-rsid="00b3bf04" fo:background-color="transparent"/>
    </style:style>
    <style:style style:name="P65" style:family="paragraph" style:parent-style-name="Text_20_body">
      <style:text-properties officeooo:rsid="00b57cd8" officeooo:paragraph-rsid="00b57cd8" fo:background-color="transparent"/>
    </style:style>
    <style:style style:name="P66" style:family="paragraph" style:parent-style-name="Text_20_body">
      <style:text-properties officeooo:rsid="00bcc1ad" officeooo:paragraph-rsid="00bcc1ad" fo:background-color="transparent"/>
    </style:style>
    <style:style style:name="P67" style:family="paragraph" style:parent-style-name="Text_20_body">
      <style:text-properties officeooo:rsid="00c0c263" officeooo:paragraph-rsid="00c0c263" fo:background-color="transparent"/>
    </style:style>
    <style:style style:name="P68" style:family="paragraph" style:parent-style-name="Text_20_body">
      <style:text-properties officeooo:rsid="00c88edc" officeooo:paragraph-rsid="00c88edc" fo:background-color="transparent"/>
    </style:style>
    <style:style style:name="P69" style:family="paragraph" style:parent-style-name="Text_20_body">
      <style:text-properties officeooo:rsid="009897c2" officeooo:paragraph-rsid="009897c2"/>
    </style:style>
    <style:style style:name="P70" style:family="paragraph" style:parent-style-name="Text_20_body">
      <style:text-properties officeooo:rsid="009ac467" officeooo:paragraph-rsid="00a0e569"/>
    </style:style>
    <style:style style:name="P71" style:family="paragraph" style:parent-style-name="Text_20_body">
      <style:text-properties officeooo:paragraph-rsid="00ab8dbd"/>
    </style:style>
    <style:style style:name="P72" style:family="paragraph" style:parent-style-name="Text_20_body">
      <style:paragraph-properties fo:text-align="center" style:justify-single-word="false"/>
      <style:text-properties officeooo:rsid="00c4b87c" officeooo:paragraph-rsid="00c4b87c"/>
    </style:style>
    <style:style style:name="P73" style:family="paragraph" style:parent-style-name="Text_20_body">
      <style:text-properties officeooo:rsid="003428a7" officeooo:paragraph-rsid="003428a7"/>
    </style:style>
    <style:style style:name="P74" style:family="paragraph" style:parent-style-name="Standard">
      <style:text-properties officeooo:rsid="0030d92e" officeooo:paragraph-rsid="003428a7"/>
    </style:style>
    <style:style style:name="P75" style:family="paragraph" style:parent-style-name="Text_20_body">
      <style:text-properties officeooo:rsid="00cbea21" officeooo:paragraph-rsid="00cbea21"/>
    </style:style>
    <style:style style:name="P76" style:family="paragraph" style:parent-style-name="Text_20_body">
      <style:text-properties officeooo:rsid="00cc902f" officeooo:paragraph-rsid="00cc902f"/>
    </style:style>
    <style:style style:name="P77" style:family="paragraph" style:parent-style-name="Text_20_body">
      <style:text-properties officeooo:rsid="00cd8367" officeooo:paragraph-rsid="00cd8367"/>
    </style:style>
    <style:style style:name="P78" style:family="paragraph" style:parent-style-name="Text_20_body">
      <style:text-properties officeooo:rsid="00cdb797" officeooo:paragraph-rsid="00cdb797"/>
    </style:style>
    <style:style style:name="P79" style:family="paragraph" style:parent-style-name="Text_20_body">
      <style:text-properties officeooo:rsid="00d0af29" officeooo:paragraph-rsid="00d0af29"/>
    </style:style>
    <style:style style:name="P80" style:family="paragraph" style:parent-style-name="Text_20_body">
      <style:text-properties officeooo:rsid="00d22a9f" officeooo:paragraph-rsid="00d22a9f"/>
    </style:style>
    <style:style style:name="P81" style:family="paragraph" style:parent-style-name="Text_20_body">
      <style:text-properties fo:font-style="normal" fo:font-weight="normal" officeooo:rsid="00e004ca" officeooo:paragraph-rsid="00e004ca" style:font-style-asian="normal" style:font-weight-asian="normal" style:font-style-complex="normal" style:font-weight-complex="normal"/>
    </style:style>
    <style:style style:name="P82" style:family="paragraph" style:parent-style-name="Standard">
      <style:text-properties officeooo:rsid="00f4ef37" officeooo:paragraph-rsid="00f4ef37" fo:background-color="#ffff00"/>
    </style:style>
    <style:style style:name="P83" style:family="paragraph" style:parent-style-name="Contents_20_2">
      <style:paragraph-properties>
        <style:tab-stops>
          <style:tab-stop style:position="6.7283in" style:type="right" style:leader-style="dotted" style:leader-text="."/>
        </style:tab-stops>
      </style:paragraph-properties>
    </style:style>
    <style:style style:name="P84" style:family="paragraph" style:parent-style-name="Contents_20_3">
      <style:paragraph-properties>
        <style:tab-stops>
          <style:tab-stop style:position="6.5311in" style:type="right" style:leader-style="dotted" style:leader-text="."/>
        </style:tab-stops>
      </style:paragraph-properties>
    </style:style>
    <style:style style:name="P85" style:family="paragraph" style:parent-style-name="Contents_20_4">
      <style:paragraph-properties>
        <style:tab-stops>
          <style:tab-stop style:position="6.3346in" style:type="right" style:leader-style="dotted" style:leader-text="."/>
        </style:tab-stops>
      </style:paragraph-properties>
    </style:style>
    <style:style style:name="P86" style:family="paragraph" style:parent-style-name="Heading_20_2">
      <style:text-properties officeooo:rsid="0022497e" officeooo:paragraph-rsid="0022497e"/>
    </style:style>
    <style:style style:name="P87" style:family="paragraph" style:parent-style-name="Heading_20_2">
      <style:text-properties officeooo:rsid="00964db9" officeooo:paragraph-rsid="00964db9"/>
    </style:style>
    <style:style style:name="P88" style:family="paragraph" style:parent-style-name="Heading_20_2">
      <style:text-properties officeooo:rsid="00cbea21" officeooo:paragraph-rsid="00cbea21"/>
    </style:style>
    <style:style style:name="P89" style:family="paragraph" style:parent-style-name="Heading_20_2">
      <style:text-properties officeooo:rsid="002a268d" officeooo:paragraph-rsid="002a268d"/>
    </style:style>
    <style:style style:name="P90" style:family="paragraph" style:parent-style-name="Heading_20_3">
      <style:text-properties officeooo:rsid="00250aab" officeooo:paragraph-rsid="0031e192"/>
    </style:style>
    <style:style style:name="P91" style:family="paragraph" style:parent-style-name="Heading_20_3">
      <style:text-properties officeooo:rsid="00250aab" officeooo:paragraph-rsid="00250aab"/>
    </style:style>
    <style:style style:name="P92" style:family="paragraph" style:parent-style-name="Heading_20_3">
      <style:text-properties officeooo:rsid="00250aab" officeooo:paragraph-rsid="00c88edc" fo:background-color="transparent"/>
    </style:style>
    <style:style style:name="P93" style:family="paragraph" style:parent-style-name="Heading_20_3">
      <style:text-properties officeooo:rsid="002a268d" officeooo:paragraph-rsid="002a268d"/>
    </style:style>
    <style:style style:name="P94" style:family="paragraph" style:parent-style-name="Heading_20_3">
      <style:text-properties officeooo:rsid="002ba7bd" officeooo:paragraph-rsid="002ba7bd"/>
    </style:style>
    <style:style style:name="P95" style:family="paragraph" style:parent-style-name="Heading_20_3">
      <style:text-properties officeooo:rsid="00cbea21" officeooo:paragraph-rsid="00cbea21"/>
    </style:style>
    <style:style style:name="P96" style:family="paragraph" style:parent-style-name="Heading_20_3">
      <style:text-properties officeooo:rsid="00cc902f" officeooo:paragraph-rsid="00cc902f"/>
    </style:style>
    <style:style style:name="P97" style:family="paragraph" style:parent-style-name="Heading_20_4">
      <style:text-properties officeooo:rsid="00cc902f" officeooo:paragraph-rsid="00cc902f"/>
    </style:style>
    <style:style style:name="P98" style:family="paragraph" style:parent-style-name="Heading_20_4">
      <style:text-properties officeooo:rsid="00e004ca" officeooo:paragraph-rsid="00e004ca"/>
    </style:style>
    <style:style style:name="P99" style:family="paragraph" style:parent-style-name="Text_20_body">
      <style:text-properties fo:font-weight="bold" officeooo:rsid="00cc902f" officeooo:paragraph-rsid="00cc902f" style:font-weight-asian="bold" style:font-weight-complex="bold"/>
    </style:style>
    <style:style style:name="P100" style:family="paragraph" style:parent-style-name="Text_20_body">
      <style:text-properties fo:font-weight="normal" officeooo:rsid="00de3e25" officeooo:paragraph-rsid="00de3e25" style:font-weight-asian="normal" style:font-weight-complex="normal"/>
    </style:style>
    <style:style style:name="P101" style:family="paragraph" style:parent-style-name="Text_20_body">
      <style:text-properties fo:font-weight="normal" officeooo:rsid="00e0e48b" officeooo:paragraph-rsid="00e0e48b" style:font-weight-asian="normal" style:font-weight-complex="normal"/>
    </style:style>
    <style:style style:name="P102" style:family="paragraph" style:parent-style-name="Text_20_body">
      <style:text-properties fo:font-weight="normal" officeooo:rsid="00e2751d" officeooo:paragraph-rsid="00e2751d" style:font-weight-asian="normal" style:font-weight-complex="normal"/>
    </style:style>
    <style:style style:name="P103" style:family="paragraph" style:parent-style-name="Text_20_body">
      <style:text-properties fo:font-weight="normal" officeooo:rsid="00e6683a" officeooo:paragraph-rsid="00e6683a" style:font-weight-asian="normal" style:font-weight-complex="normal"/>
    </style:style>
    <style:style style:name="P104" style:family="paragraph" style:parent-style-name="Text_20_body">
      <style:text-properties fo:font-weight="normal" officeooo:rsid="00e7702d" officeooo:paragraph-rsid="00e7702d" style:font-weight-asian="normal" style:font-weight-complex="normal"/>
    </style:style>
    <style:style style:name="P105" style:family="paragraph" style:parent-style-name="Text_20_body">
      <style:text-properties fo:font-weight="normal" officeooo:rsid="00f21c2b" officeooo:paragraph-rsid="00f21c2b" style:font-weight-asian="normal" style:font-weight-complex="normal"/>
    </style:style>
    <style:style style:name="P106" style:family="paragraph" style:parent-style-name="Text_20_body">
      <style:text-properties fo:font-weight="normal" officeooo:rsid="00cc902f" officeooo:paragraph-rsid="00eba6b0" style:font-weight-asian="normal" style:font-weight-complex="normal"/>
    </style:style>
    <style:style style:name="P107" style:family="paragraph" style:parent-style-name="Text_20_body">
      <style:paragraph-properties fo:text-align="center" style:justify-single-word="false"/>
      <style:text-properties officeooo:rsid="00f26377" officeooo:paragraph-rsid="00f26377" fo:background-color="#ffff00"/>
    </style:style>
    <style:style style:name="P108" style:family="paragraph" style:parent-style-name="Text_20_body">
      <style:text-properties officeooo:rsid="0065cc99" officeooo:paragraph-rsid="0065cc99" fo:background-color="#ffff00"/>
    </style:style>
    <style:style style:name="P109" style:family="paragraph" style:parent-style-name="Text_20_body">
      <style:text-properties officeooo:rsid="003f50a7" officeooo:paragraph-rsid="003f50a7"/>
    </style:style>
    <style:style style:name="P110" style:family="paragraph" style:parent-style-name="Text_20_body">
      <style:text-properties officeooo:paragraph-rsid="0042691f"/>
    </style:style>
    <style:style style:name="T1" style:family="text">
      <style:text-properties officeooo:rsid="0026cb5b"/>
    </style:style>
    <style:style style:name="T2" style:family="text">
      <style:text-properties officeooo:rsid="0023a4dc"/>
    </style:style>
    <style:style style:name="T3" style:family="text">
      <style:text-properties officeooo:rsid="0024da68"/>
    </style:style>
    <style:style style:name="T4" style:family="text">
      <style:text-properties officeooo:rsid="00250aab"/>
    </style:style>
    <style:style style:name="T5" style:family="text">
      <style:text-properties officeooo:rsid="002750d7"/>
    </style:style>
    <style:style style:name="T6" style:family="text">
      <style:text-properties officeooo:rsid="00284a3b"/>
    </style:style>
    <style:style style:name="T7" style:family="text">
      <style:text-properties officeooo:rsid="00297426"/>
    </style:style>
    <style:style style:name="T8" style:family="text">
      <style:text-properties officeooo:rsid="0029dbc8"/>
    </style:style>
    <style:style style:name="T9" style:family="text">
      <style:text-properties style:text-position="super 58%"/>
    </style:style>
    <style:style style:name="T10" style:family="text">
      <style:text-properties style:text-position="super 58%" officeooo:rsid="002a2dab"/>
    </style:style>
    <style:style style:name="T11" style:family="text">
      <style:text-properties style:text-position="super 58%" officeooo:rsid="0032bcbe"/>
    </style:style>
    <style:style style:name="T12" style:family="text">
      <style:text-properties style:text-position="super 58%" fo:font-weight="normal" style:font-weight-asian="normal" style:font-weight-complex="normal"/>
    </style:style>
    <style:style style:name="T13" style:family="text">
      <style:text-properties style:text-position="super 58%" fo:font-weight="normal" officeooo:rsid="0035264d" style:font-weight-asian="normal" style:font-weight-complex="normal"/>
    </style:style>
    <style:style style:name="T14" style:family="text">
      <style:text-properties style:text-position="super 58%" officeooo:rsid="003993a6"/>
    </style:style>
    <style:style style:name="T15" style:family="text">
      <style:text-properties style:text-position="super 58%" officeooo:rsid="004a499a"/>
    </style:style>
    <style:style style:name="T16" style:family="text">
      <style:text-properties officeooo:rsid="002a2dab"/>
    </style:style>
    <style:style style:name="T17" style:family="text">
      <style:text-properties style:text-position="0% 100%"/>
    </style:style>
    <style:style style:name="T18" style:family="text">
      <style:text-properties style:text-position="0% 100%" officeooo:rsid="002a2dab"/>
    </style:style>
    <style:style style:name="T19" style:family="text">
      <style:text-properties style:text-position="0% 100%" fo:font-weight="bold" style:font-weight-asian="bold" style:font-weight-complex="bold"/>
    </style:style>
    <style:style style:name="T20" style:family="text">
      <style:text-properties style:text-position="0% 100%" fo:font-weight="bold" officeooo:rsid="002d7ea4" style:font-weight-asian="bold" style:font-weight-complex="bold"/>
    </style:style>
    <style:style style:name="T21" style:family="text">
      <style:text-properties style:text-position="0% 100%" fo:font-weight="bold" officeooo:rsid="0032bcbe" style:font-weight-asian="bold" style:font-weight-complex="bold"/>
    </style:style>
    <style:style style:name="T22" style:family="text">
      <style:text-properties style:text-position="0% 100%" fo:font-weight="normal" style:font-weight-asian="normal" style:font-weight-complex="normal"/>
    </style:style>
    <style:style style:name="T23" style:family="text">
      <style:text-properties style:text-position="0% 100%" fo:font-weight="normal" officeooo:rsid="002d7ea4" style:font-weight-asian="normal" style:font-weight-complex="normal"/>
    </style:style>
    <style:style style:name="T24" style:family="text">
      <style:text-properties style:text-position="0% 100%" fo:font-weight="normal" officeooo:rsid="0032bcbe" style:font-weight-asian="normal" style:font-weight-complex="normal"/>
    </style:style>
    <style:style style:name="T25" style:family="text">
      <style:text-properties style:text-position="0% 100%" fo:font-weight="normal" officeooo:rsid="003428a7" style:font-weight-asian="normal" style:font-weight-complex="normal"/>
    </style:style>
    <style:style style:name="T26" style:family="text">
      <style:text-properties style:text-position="0% 100%" fo:font-weight="normal" officeooo:rsid="0035264d" style:font-weight-asian="normal" style:font-weight-complex="normal"/>
    </style:style>
    <style:style style:name="T27" style:family="text">
      <style:text-properties style:text-position="0% 100%" fo:font-weight="normal" officeooo:rsid="0037f853" style:font-weight-asian="normal" style:font-weight-complex="normal"/>
    </style:style>
    <style:style style:name="T28" style:family="text">
      <style:text-properties style:text-position="0% 100%" fo:font-weight="normal" officeooo:rsid="003d97df" style:font-weight-asian="normal" style:font-weight-complex="normal"/>
    </style:style>
    <style:style style:name="T29" style:family="text">
      <style:text-properties style:text-position="0% 100%" fo:font-weight="normal" officeooo:rsid="003d9f1b" style:font-weight-asian="normal" style:font-weight-complex="normal"/>
    </style:style>
    <style:style style:name="T30" style:family="text">
      <style:text-properties style:text-position="0% 100%" fo:font-weight="normal" officeooo:rsid="003ebbfb" style:font-weight-asian="normal" style:font-weight-complex="normal"/>
    </style:style>
    <style:style style:name="T31" style:family="text">
      <style:text-properties style:text-position="0% 100%" fo:font-weight="normal" officeooo:rsid="003f8440" style:font-weight-asian="normal" style:font-weight-complex="normal"/>
    </style:style>
    <style:style style:name="T32" style:family="text">
      <style:text-properties style:text-position="0% 100%" fo:font-weight="normal" officeooo:rsid="00405fbc" style:font-weight-asian="normal" style:font-weight-complex="normal"/>
    </style:style>
    <style:style style:name="T33" style:family="text">
      <style:text-properties style:text-position="0% 100%" fo:font-weight="normal" officeooo:rsid="0045ac12" style:font-weight-asian="normal" style:font-weight-complex="normal"/>
    </style:style>
    <style:style style:name="T34" style:family="text">
      <style:text-properties style:text-position="0% 100%" fo:font-weight="normal" officeooo:rsid="0045c96b" style:font-weight-asian="normal" style:font-weight-complex="normal"/>
    </style:style>
    <style:style style:name="T35" style:family="text">
      <style:text-properties style:text-position="0% 100%" fo:font-weight="normal" officeooo:rsid="004668b3" style:font-weight-asian="normal" style:font-weight-complex="normal"/>
    </style:style>
    <style:style style:name="T36" style:family="text">
      <style:text-properties style:text-position="0% 100%" fo:font-weight="normal" officeooo:rsid="0046afa2" style:font-weight-asian="normal" style:font-weight-complex="normal"/>
    </style:style>
    <style:style style:name="T37" style:family="text">
      <style:text-properties style:text-position="0% 100%" fo:font-weight="normal" officeooo:rsid="0048a1e2" style:font-weight-asian="normal" style:font-weight-complex="normal"/>
    </style:style>
    <style:style style:name="T38" style:family="text">
      <style:text-properties style:text-position="0% 100%" fo:font-weight="normal" officeooo:rsid="004f1f94" style:font-weight-asian="normal" style:font-weight-complex="normal"/>
    </style:style>
    <style:style style:name="T39" style:family="text">
      <style:text-properties style:text-position="0% 100%" fo:font-weight="normal" officeooo:rsid="004ff452" style:font-weight-asian="normal" style:font-weight-complex="normal"/>
    </style:style>
    <style:style style:name="T40" style:family="text">
      <style:text-properties style:text-position="0% 100%" fo:font-weight="normal" officeooo:rsid="00fe9501" style:font-weight-asian="normal" style:font-weight-complex="normal"/>
    </style:style>
    <style:style style:name="T41" style:family="text">
      <style:text-properties style:text-position="0% 100%" style:text-underline-style="none" fo:font-weight="normal" officeooo:rsid="002e6480" style:font-weight-asian="normal" style:font-weight-complex="normal"/>
    </style:style>
    <style:style style:name="T42" style:family="text">
      <style:text-properties style:text-position="0% 100%" officeooo:rsid="00300b2f"/>
    </style:style>
    <style:style style:name="T43" style:family="text">
      <style:text-properties style:text-position="0% 100%" officeooo:rsid="0030b82a"/>
    </style:style>
    <style:style style:name="T44" style:family="text">
      <style:text-properties style:text-position="0% 100%" officeooo:rsid="0030d92e"/>
    </style:style>
    <style:style style:name="T45" style:family="text">
      <style:text-properties style:text-position="0% 100%" officeooo:rsid="0032bcbe"/>
    </style:style>
    <style:style style:name="T46" style:family="text">
      <style:text-properties style:text-position="0% 100%" officeooo:rsid="0037f853"/>
    </style:style>
    <style:style style:name="T47" style:family="text">
      <style:text-properties style:text-position="0% 100%" officeooo:rsid="003993a6"/>
    </style:style>
    <style:style style:name="T48" style:family="text">
      <style:text-properties style:text-position="0% 100%" officeooo:rsid="003b30a7"/>
    </style:style>
    <style:style style:name="T49" style:family="text">
      <style:text-properties style:text-position="0% 100%" officeooo:rsid="003d97df"/>
    </style:style>
    <style:style style:name="T50" style:family="text">
      <style:text-properties officeooo:rsid="0031e192"/>
    </style:style>
    <style:style style:name="T51" style:family="text">
      <style:text-properties officeooo:rsid="0042691f"/>
    </style:style>
    <style:style style:name="T52" style:family="text">
      <style:text-properties officeooo:rsid="004965d3"/>
    </style:style>
    <style:style style:name="T53" style:family="text">
      <style:text-properties officeooo:rsid="004a499a"/>
    </style:style>
    <style:style style:name="T54" style:family="text">
      <style:text-properties fo:font-style="italic"/>
    </style:style>
    <style:style style:name="T55" style:family="text">
      <style:text-properties fo:font-style="italic" officeooo:rsid="00bae547" style:font-style-asian="italic" style:font-style-complex="italic"/>
    </style:style>
    <style:style style:name="T56" style:family="text">
      <style:text-properties fo:font-style="italic" officeooo:rsid="00b1e885" style:font-style-asian="italic" style:font-style-complex="italic"/>
    </style:style>
    <style:style style:name="T57" style:family="text">
      <style:text-properties fo:font-style="italic" officeooo:rsid="00b23a6d" style:font-style-asian="italic" style:font-style-complex="italic"/>
    </style:style>
    <style:style style:name="T58" style:family="text">
      <style:text-properties officeooo:rsid="004ba55a"/>
    </style:style>
    <style:style style:name="T59" style:family="text">
      <style:text-properties officeooo:rsid="004cbbe8"/>
    </style:style>
    <style:style style:name="T60" style:family="text">
      <style:text-properties officeooo:rsid="004d24b6"/>
    </style:style>
    <style:style style:name="T61" style:family="text">
      <style:text-properties officeooo:rsid="0051d498"/>
    </style:style>
    <style:style style:name="T62" style:family="text">
      <style:text-properties officeooo:rsid="005559f2"/>
    </style:style>
    <style:style style:name="T63" style:family="text">
      <style:text-properties officeooo:rsid="00564dcf"/>
    </style:style>
    <style:style style:name="T64" style:family="text">
      <style:text-properties officeooo:rsid="00565d93"/>
    </style:style>
    <style:style style:name="T65" style:family="text">
      <style:text-properties officeooo:rsid="00579f81"/>
    </style:style>
    <style:style style:name="T66" style:family="text">
      <style:text-properties officeooo:rsid="00596364"/>
    </style:style>
    <style:style style:name="T67" style:family="text">
      <style:text-properties officeooo:rsid="005acd8d"/>
    </style:style>
    <style:style style:name="T68" style:family="text">
      <style:text-properties officeooo:rsid="005ffec8"/>
    </style:style>
    <style:style style:name="T69" style:family="text">
      <style:text-properties officeooo:rsid="00613d8e"/>
    </style:style>
    <style:style style:name="T70" style:family="text">
      <style:text-properties officeooo:rsid="0061bc73"/>
    </style:style>
    <style:style style:name="T71" style:family="text">
      <style:text-properties officeooo:rsid="00623fc7"/>
    </style:style>
    <style:style style:name="T72" style:family="text">
      <style:text-properties officeooo:rsid="00639a4b"/>
    </style:style>
    <style:style style:name="T73" style:family="text">
      <style:text-properties officeooo:rsid="0063bdaf"/>
    </style:style>
    <style:style style:name="T74" style:family="text">
      <style:text-properties officeooo:rsid="0066aef1"/>
    </style:style>
    <style:style style:name="T75" style:family="text">
      <style:text-properties officeooo:rsid="006925d0"/>
    </style:style>
    <style:style style:name="T76" style:family="text">
      <style:text-properties officeooo:rsid="006dbee2" fo:background-color="transparent" loext:char-shading-value="0"/>
    </style:style>
    <style:style style:name="T77" style:family="text">
      <style:text-properties officeooo:rsid="006ea9b0" fo:background-color="transparent" loext:char-shading-value="0"/>
    </style:style>
    <style:style style:name="T78" style:family="text">
      <style:text-properties officeooo:rsid="007e9dfc" fo:background-color="transparent" loext:char-shading-value="0"/>
    </style:style>
    <style:style style:name="T79" style:family="text">
      <style:text-properties officeooo:rsid="008087c1" fo:background-color="transparent" loext:char-shading-value="0"/>
    </style:style>
    <style:style style:name="T80" style:family="text">
      <style:text-properties officeooo:rsid="0081e65a" fo:background-color="transparent" loext:char-shading-value="0"/>
    </style:style>
    <style:style style:name="T81" style:family="text">
      <style:text-properties officeooo:rsid="0082930c" fo:background-color="transparent" loext:char-shading-value="0"/>
    </style:style>
    <style:style style:name="T82" style:family="text">
      <style:text-properties officeooo:rsid="0083e9e9" fo:background-color="transparent" loext:char-shading-value="0"/>
    </style:style>
    <style:style style:name="T83" style:family="text">
      <style:text-properties officeooo:rsid="0084e465" fo:background-color="transparent" loext:char-shading-value="0"/>
    </style:style>
    <style:style style:name="T84" style:family="text">
      <style:text-properties officeooo:rsid="008696e0" fo:background-color="transparent" loext:char-shading-value="0"/>
    </style:style>
    <style:style style:name="T85" style:family="text">
      <style:text-properties officeooo:rsid="00883cc9" fo:background-color="transparent" loext:char-shading-value="0"/>
    </style:style>
    <style:style style:name="T86" style:family="text">
      <style:text-properties officeooo:rsid="00893cde" fo:background-color="transparent" loext:char-shading-value="0"/>
    </style:style>
    <style:style style:name="T87" style:family="text">
      <style:text-properties officeooo:rsid="00734809"/>
    </style:style>
    <style:style style:name="T88" style:family="text">
      <style:text-properties officeooo:rsid="0073c2a5"/>
    </style:style>
    <style:style style:name="T89" style:family="text">
      <style:text-properties officeooo:rsid="00753a98"/>
    </style:style>
    <style:style style:name="T90" style:family="text">
      <style:text-properties officeooo:rsid="00775d0f"/>
    </style:style>
    <style:style style:name="T91" style:family="text">
      <style:text-properties officeooo:rsid="0079532a"/>
    </style:style>
    <style:style style:name="T92" style:family="text">
      <style:text-properties officeooo:rsid="007a7951"/>
    </style:style>
    <style:style style:name="T93" style:family="text">
      <style:text-properties officeooo:rsid="007b94f5"/>
    </style:style>
    <style:style style:name="T94" style:family="text">
      <style:text-properties officeooo:rsid="007d0426"/>
    </style:style>
    <style:style style:name="T95" style:family="text">
      <style:text-properties officeooo:rsid="007d3445"/>
    </style:style>
    <style:style style:name="T96" style:family="text">
      <style:text-properties officeooo:rsid="008c2825"/>
    </style:style>
    <style:style style:name="T97" style:family="text">
      <style:text-properties officeooo:rsid="008fac75"/>
    </style:style>
    <style:style style:name="T98" style:family="text">
      <style:text-properties officeooo:rsid="0093012b"/>
    </style:style>
    <style:style style:name="T99" style:family="text">
      <style:text-properties officeooo:rsid="009897c2"/>
    </style:style>
    <style:style style:name="T100" style:family="text">
      <style:text-properties officeooo:rsid="0098c47e"/>
    </style:style>
    <style:style style:name="T101" style:family="text">
      <style:text-properties officeooo:rsid="00990758"/>
    </style:style>
    <style:style style:name="T102" style:family="text">
      <style:text-properties officeooo:rsid="009c992d"/>
    </style:style>
    <style:style style:name="T103" style:family="text">
      <style:text-properties officeooo:rsid="009dce54"/>
    </style:style>
    <style:style style:name="T104" style:family="text">
      <style:text-properties officeooo:rsid="00a0e569"/>
    </style:style>
    <style:style style:name="T105" style:family="text">
      <style:text-properties officeooo:rsid="00a49cc5"/>
    </style:style>
    <style:style style:name="T106" style:family="text">
      <style:text-properties officeooo:rsid="00a6190c"/>
    </style:style>
    <style:style style:name="T107" style:family="text">
      <style:text-properties fo:color="#000000" loext:opacity="100%" officeooo:rsid="009ac467" fo:background-color="transparent" loext:char-shading-value="0"/>
    </style:style>
    <style:style style:name="T108" style:family="text">
      <style:text-properties fo:color="#000000" loext:opacity="100%" officeooo:rsid="00a0c894" fo:background-color="transparent" loext:char-shading-value="0"/>
    </style:style>
    <style:style style:name="T109" style:family="text">
      <style:text-properties fo:color="#000000" loext:opacity="100%" officeooo:rsid="00a7b606" fo:background-color="transparent" loext:char-shading-value="0"/>
    </style:style>
    <style:style style:name="T110" style:family="text">
      <style:text-properties fo:color="#000000" loext:opacity="100%" officeooo:rsid="00a88f3c" fo:background-color="transparent" loext:char-shading-value="0"/>
    </style:style>
    <style:style style:name="T111" style:family="text">
      <style:text-properties fo:color="#000000" loext:opacity="100%" officeooo:rsid="00ab8dbd" fo:background-color="transparent" loext:char-shading-value="0"/>
    </style:style>
    <style:style style:name="T112" style:family="text">
      <style:text-properties fo:color="#000000" loext:opacity="100%" officeooo:rsid="00b86eb8" fo:background-color="transparent" loext:char-shading-value="0"/>
    </style:style>
    <style:style style:name="T113" style:family="text">
      <style:text-properties fo:color="#000000" loext:opacity="100%" officeooo:rsid="00ba5bfe" fo:background-color="transparent" loext:char-shading-value="0"/>
    </style:style>
    <style:style style:name="T114" style:family="text">
      <style:text-properties officeooo:rsid="00ac64b7"/>
    </style:style>
    <style:style style:name="T115" style:family="text">
      <style:text-properties officeooo:rsid="00adcad9"/>
    </style:style>
    <style:style style:name="T116" style:family="text">
      <style:text-properties officeooo:rsid="00ae828e"/>
    </style:style>
    <style:style style:name="T117" style:family="text">
      <style:text-properties officeooo:rsid="00affa02"/>
    </style:style>
    <style:style style:name="T118" style:family="text">
      <style:text-properties officeooo:rsid="00b1e885"/>
    </style:style>
    <style:style style:name="T119" style:family="text">
      <style:text-properties officeooo:rsid="00b23a6d"/>
    </style:style>
    <style:style style:name="T120" style:family="text">
      <style:text-properties officeooo:rsid="00b57cd8"/>
    </style:style>
    <style:style style:name="T121" style:family="text">
      <style:text-properties officeooo:rsid="00b74273"/>
    </style:style>
    <style:style style:name="T122" style:family="text">
      <style:text-properties officeooo:rsid="00bae547"/>
    </style:style>
    <style:style style:name="T123" style:family="text">
      <style:text-properties officeooo:rsid="00bd3212"/>
    </style:style>
    <style:style style:name="T124" style:family="text">
      <style:text-properties officeooo:rsid="00c390d1"/>
    </style:style>
    <style:style style:name="T125" style:family="text">
      <style:text-properties officeooo:rsid="00c46a9b"/>
    </style:style>
    <style:style style:name="T126" style:family="text">
      <style:text-properties officeooo:rsid="00c4b87c"/>
    </style:style>
    <style:style style:name="T127" style:family="text">
      <style:text-properties officeooo:rsid="00c669e2"/>
    </style:style>
    <style:style style:name="T128" style:family="text">
      <style:text-properties officeooo:rsid="00c88edc"/>
    </style:style>
    <style:style style:name="T129" style:family="text">
      <style:text-properties officeooo:rsid="00cbea21"/>
    </style:style>
    <style:style style:name="T130" style:family="text">
      <style:text-properties fo:font-weight="bold" style:font-weight-asian="bold" style:font-weight-complex="bold"/>
    </style:style>
    <style:style style:name="T131" style:family="text">
      <style:text-properties fo:font-weight="normal" style:font-weight-asian="normal" style:font-weight-complex="normal"/>
    </style:style>
    <style:style style:name="T132" style:family="text">
      <style:text-properties fo:font-weight="normal" officeooo:rsid="00d62c43" style:font-weight-asian="normal" style:font-weight-complex="normal"/>
    </style:style>
    <style:style style:name="T133" style:family="text">
      <style:text-properties fo:font-weight="normal" officeooo:rsid="00d6fed9" style:font-weight-asian="normal" style:font-weight-complex="normal"/>
    </style:style>
    <style:style style:name="T134" style:family="text">
      <style:text-properties fo:font-weight="normal" officeooo:rsid="00ddb192" style:font-weight-asian="normal" style:font-weight-complex="normal"/>
    </style:style>
    <style:style style:name="T135" style:family="text">
      <style:text-properties fo:font-weight="normal" officeooo:rsid="00e0e48b" style:font-weight-asian="normal" style:font-weight-complex="normal"/>
    </style:style>
    <style:style style:name="T136" style:family="text">
      <style:text-properties fo:font-weight="normal" officeooo:rsid="00e2751d" style:font-weight-asian="normal" style:font-weight-complex="normal"/>
    </style:style>
    <style:style style:name="T137" style:family="text">
      <style:text-properties fo:font-weight="normal" officeooo:rsid="00ee9691" style:font-weight-asian="normal" style:font-weight-complex="normal"/>
    </style:style>
    <style:style style:name="T138" style:family="text">
      <style:text-properties fo:font-weight="normal" officeooo:rsid="00f0722a" style:font-weight-asian="normal" style:font-weight-complex="normal"/>
    </style:style>
    <style:style style:name="T139" style:family="text">
      <style:text-properties officeooo:rsid="00cdb797"/>
    </style:style>
    <style:style style:name="T140" style:family="text">
      <style:text-properties officeooo:rsid="00cf4456"/>
    </style:style>
    <style:style style:name="T141" style:family="text">
      <style:text-properties officeooo:rsid="00d2be0e"/>
    </style:style>
    <style:style style:name="T142" style:family="text">
      <style:text-properties officeooo:rsid="00d4b0fb"/>
    </style:style>
    <style:style style:name="T143" style:family="text">
      <style:text-properties officeooo:rsid="00d6fed9"/>
    </style:style>
    <style:style style:name="T144" style:family="text">
      <style:text-properties officeooo:rsid="00e0e48b"/>
    </style:style>
    <style:style style:name="T145" style:family="text">
      <style:text-properties officeooo:rsid="00e200ba"/>
    </style:style>
    <style:style style:name="T146" style:family="text">
      <style:text-properties officeooo:rsid="00ed1f3d"/>
    </style:style>
    <style:style style:name="T147" style:family="text">
      <style:text-properties officeooo:rsid="00ff10d2"/>
    </style:style>
    <style:style style:name="T148" style:family="text">
      <style:text-properties officeooo:rsid="01007a7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ScanFold<text:span text:style-name="T1">3</text:span> User Guide</text:p>
      <text:p text:style-name="P21"><text:tab/><text:tab/><text:tab/><text:tab/><text:tab/><text:tab/></text:p>
      <text:p text:style-name="P9">For questions<text:span text:style-name="T127">,</text:span> suggestions<text:span text:style-name="T127">, or technical assistance</text:span>, please contact:</text:p>
      <text:p text:style-name="P7">Evelyn Coppenbarger<text:span text:style-name="T126">, </text:span>ecoppen@iastate.edu</text:p>
      <text:p text:style-name="P72">Moss Lab Team, https://github.com/moss-lab</text:p>
      <text:p text:style-name="P20"/>
      <text:p text:style-name="P10">Please use the following citation for ScanFold3:</text:p>
      <text:p text:style-name="P107">TB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3"><text:a xlink:type="simple" xlink:href="#__RefHeading___Toc8833_3354852222" text:style-name="Index_20_Link" text:visited-style-name="Index_20_Link">1. Introduction<text:tab/>3</text:a></text:p>
          <text:p text:style-name="P84"><text:a xlink:type="simple" xlink:href="#__RefHeading___Toc218573_4251932518" text:style-name="Index_20_Link" text:visited-style-name="Index_20_Link">How to cite ScanFold3<text:tab/>4</text:a></text:p>
          <text:p text:style-name="P84"><text:a xlink:type="simple" xlink:href="#__RefHeading___Toc218575_4251932518" text:style-name="Index_20_Link" text:visited-style-name="Index_20_Link">How to cite Cobretti<text:tab/>4</text:a></text:p>
          <text:p text:style-name="P84"><text:a xlink:type="simple" xlink:href="#__RefHeading___Toc218577_4251932518" text:style-name="Index_20_Link" text:visited-style-name="Index_20_Link">How to cite ScanFold2<text:tab/>4</text:a></text:p>
          <text:p text:style-name="P84"><text:a xlink:type="simple" xlink:href="#__RefHeading___Toc218579_4251932518" text:style-name="Index_20_Link" text:visited-style-name="Index_20_Link">How to cite ScanFold1<text:tab/>4</text:a></text:p>
          <text:p text:style-name="P84"><text:a xlink:type="simple" xlink:href="#__RefHeading___Toc218579_42519325181" text:style-name="Index_20_Link" text:visited-style-name="Index_20_Link">How to cite RNAFold<text:tab/>4</text:a></text:p>
          <text:p text:style-name="P83"><text:a xlink:type="simple" xlink:href="#__RefHeading___Toc218581_4251932518" text:style-name="Index_20_Link" text:visited-style-name="Index_20_Link">2. Background<text:tab/>4</text:a></text:p>
          <text:p text:style-name="P84"><text:a xlink:type="simple" xlink:href="#__RefHeading___Toc218583_4251932518" text:style-name="Index_20_Link" text:visited-style-name="Index_20_Link">Graphical Abstract<text:tab/>4</text:a></text:p>
          <text:p text:style-name="P84"><text:a xlink:type="simple" xlink:href="#__RefHeading___Toc218585_4251932518" text:style-name="Index_20_Link" text:visited-style-name="Index_20_Link">Thermodynamic Z-Score<text:tab/>5</text:a></text:p>
          <text:p text:style-name="P84"><text:a xlink:type="simple" xlink:href="#__RefHeading___Toc218587_4251932518" text:style-name="Index_20_Link" text:visited-style-name="Index_20_Link"><text:span text:style-name="T17">S</text:span></text:a><text:a xlink:type="simple" xlink:href="#__RefHeading___Toc218587_4251932518" text:style-name="Index_20_Link" text:visited-style-name="Index_20_Link"><text:span text:style-name="T17">canFold Algorithm</text:span></text:a><text:a xlink:type="simple" xlink:href="#__RefHeading___Toc218587_4251932518" text:style-name="Index_20_Link" text:visited-style-name="Index_20_Link"><text:tab/>5</text:a></text:p>
          <text:p text:style-name="P84"><text:a xlink:type="simple" xlink:href="#__RefHeading___Toc218589_4251932518" text:style-name="Index_20_Link" text:visited-style-name="Index_20_Link"><text:span text:style-name="T17">S</text:span></text:a><text:a xlink:type="simple" xlink:href="#__RefHeading___Toc218589_4251932518" text:style-name="Index_20_Link" text:visited-style-name="Index_20_Link"><text:span text:style-name="T17">tructure determination</text:span></text:a><text:a xlink:type="simple" xlink:href="#__RefHeading___Toc218589_4251932518" text:style-name="Index_20_Link" text:visited-style-name="Index_20_Link"><text:tab/>6</text:a></text:p>
          <text:p text:style-name="P84"><text:a xlink:type="simple" xlink:href="#__RefHeading___Toc218591_4251932518" text:style-name="Index_20_Link" text:visited-style-name="Index_20_Link">Speed Considerations<text:tab/>7</text:a></text:p>
          <text:p text:style-name="P83"><text:a xlink:type="simple" xlink:href="#__RefHeading___Toc218593_4251932518" text:style-name="Index_20_Link" text:visited-style-name="Index_20_Link">3. Requirements<text:tab/>9</text:a></text:p>
          <text:p text:style-name="P84"><text:a xlink:type="simple" xlink:href="#__RefHeading___Toc218595_4251932518" text:style-name="Index_20_Link" text:visited-style-name="Index_20_Link">To run<text:tab/>9</text:a></text:p>
          <text:p text:style-name="P84"><text:a xlink:type="simple" xlink:href="#__RefHeading___Toc218597_4251932518" text:style-name="Index_20_Link" text:visited-style-name="Index_20_Link">To compile (optional)<text:tab/>9</text:a></text:p>
          <text:p text:style-name="P83"><text:a xlink:type="simple" xlink:href="#__RefHeading___Toc218599_4251932518" text:style-name="Index_20_Link" text:visited-style-name="Index_20_Link">4. Installation<text:tab/>9</text:a></text:p>
          <text:p text:style-name="P84"><text:a xlink:type="simple" xlink:href="#__RefHeading___Toc218601_4251932518" text:style-name="Index_20_Link" text:visited-style-name="Index_20_Link">Compiling ScanFold3<text:tab/>10</text:a></text:p>
          <text:p text:style-name="P84"><text:a xlink:type="simple" xlink:href="#__RefHeading___Toc218603_4251932518" text:style-name="Index_20_Link" text:visited-style-name="Index_20_Link">Troubleshooting Installation<text:tab/>10</text:a></text:p>
          <text:p text:style-name="P83"><text:a xlink:type="simple" xlink:href="#__RefHeading___Toc42712_3640823107" text:style-name="Index_20_Link" text:visited-style-name="Index_20_Link">5. Usage<text:tab/>11</text:a></text:p>
          <text:p text:style-name="P84"><text:a xlink:type="simple" xlink:href="#__RefHeading___Toc42714_3640823107" text:style-name="Index_20_Link" text:visited-style-name="Index_20_Link">Running ScanFold<text:tab/>11</text:a></text:p>
          <text:p text:style-name="P84"><text:a xlink:type="simple" xlink:href="#__RefHeading___Toc42716_3640823107" text:style-name="Index_20_Link" text:visited-style-name="Index_20_Link">Flags (optional)<text:tab/>11</text:a></text:p>
          <text:p text:style-name="P85"><text:a xlink:type="simple" xlink:href="#__RefHeading___Toc42718_3640823107" text:style-name="Index_20_Link" text:visited-style-name="Index_20_Link">I/O<text:tab/>11</text:a></text:p>
          <text:p text:style-name="P85"><text:a xlink:type="simple" xlink:href="#__RefHeading___Toc42720_3640823107" text:style-name="Index_20_Link" text:visited-style-name="Index_20_Link">Webserver<text:tab/>12</text:a></text:p>
          <text:p text:style-name="P85"><text:a xlink:type="simple" xlink:href="#__RefHeading___Toc42722_3640823107" text:style-name="Index_20_Link" text:visited-style-name="Index_20_Link">Scan Stage<text:tab/>13</text:a></text:p>
          <text:p text:style-name="P85"><text:a xlink:type="simple" xlink:href="#__RefHeading___Toc42724_3640823107" text:style-name="Index_20_Link" text:visited-style-name="Index_20_Link">Fold Stage<text:tab/>13</text:a></text:p>
          <text:p text:style-name="P83"><text:a xlink:type="simple" xlink:href="#__RefHeading___Toc218605_4251932518" text:style-name="Index_20_Link" text:visited-style-name="Index_20_Link">Bibliography<text:tab/>13</text:a></text:p>
        </text:index-body>
      </text:table-of-content>
      <text:p text:style-name="P5"/>
      <text:p text:style-name="P5"/>
      <text:p text:style-name="P5"/>
      <text:p text:style-name="P5"/>
      <text:p text:style-name="P5"/>
      <text:p text:style-name="P5"/>
      <text:p text:style-name="P5"/>
      <text:h text:style-name="P86" text:outline-level="2" text:is-list-header="true"><text:bookmark-start text:name="__RefHeading___Toc8833_3354852222"/><text:soft-page-break/>1. Introduction<text:bookmark-end text:name="__RefHeading___Toc8833_3354852222"/></text:h>
      <text:p text:style-name="P6">ScanFold is a program for finding<text:span text:style-name="T2">, predicting, and scoring</text:span> local RNA structures within long RNA or DNA sequences, such as entire genes or viral genomes.<text:span text:style-name="T3"> ScanFold uses a window-based approach to find short-ranged base pairs</text:span><text:span text:style-name="T5"> (default of 120 bases)</text:span><text:span text:style-name="T3"> which </text:span><text:span text:style-name="T6">consistently </text:span><text:span text:style-name="T3">reoccur across windows. The primary method of scoring base pairs via ScanFold is the thermodynamic z-score, which is how much more stable the structures a pair is found within are than would be expected from random chance. </text:span><text:span text:style-name="T7">Pairs are assigned a z-score based on the normalized thermodynamic z-score of structures they occur within, which provides an indirect measurement of the stability that pair contributes to the structural ensemble. </text:span><text:span text:style-name="T3">Co</text:span><text:span text:style-name="T2">variation based analysis of ScanFold motifs </text:span><text:span text:style-name="T3">is recommended, and</text:span><text:span text:style-name="T8"> along with 3D structure and bindable pocket prediction</text:span><text:span text:style-name="T3"> </text:span><text:span text:style-name="T2">may be automated via the Cobretti pipeline, </text:span><text:span text:style-name="T4">which can be </text:span><text:span text:style-name="T2">found at https://github.com/moss-lab/Cobretti. </text:span></text:p>
      <text:h text:style-name="P90" text:outline-level="3"><text:bookmark-start text:name="__RefHeading___Toc218573_4251932518"/>How to cite ScanFold<text:span text:style-name="T5">3</text:span><text:bookmark-end text:name="__RefHeading___Toc218573_4251932518"/></text:h>
      <text:p text:style-name="P82">TBD</text:p>
      <text:h text:style-name="P90" text:outline-level="3"><text:bookmark-start text:name="__RefHeading___Toc218575_4251932518"/>How to cite Cobretti<text:bookmark-end text:name="__RefHeading___Toc218575_4251932518"/></text:h>
      <text:p text:style-name="P17"><text:span text:style-name="T4">Peterson JM, O'Leary CA, Coppenbarger EC, Tompkins VS, Moss WN. Discovery of RNA secondary structural motifs using sequence-ordered thermodynamic stability and comparative sequence analysis. MethodsX. 2023 Jun 29;11:102275. doi: 10.1016/j.mex.2023.102275. PMID: 37448951; PMCID: PMC10336498.</text:span></text:p>
      <text:h text:style-name="P91" text:outline-level="3"><text:bookmark-start text:name="__RefHeading___Toc218577_4251932518"/>How to cite ScanFold2<text:bookmark-end text:name="__RefHeading___Toc218577_4251932518"/></text:h>
      <text:p text:style-name="P4">Andrews RJ, Rouse WB, O'Leary CA, Booher NJ, Moss WN. ScanFold 2.0: a rapid approach for identifying potential structured RNA targets in genomes and transcriptomes. PeerJ. 2022 Nov 8;10:e14361. doi: 10.7717/peerj.14361. PMID: 36389431; PMCID: PMC9651051.</text:p>
      <text:h text:style-name="P90" text:outline-level="3"><text:bookmark-start text:name="__RefHeading___Toc218579_4251932518"/>How to cite ScanFold<text:span text:style-name="T50">1</text:span><text:bookmark-end text:name="__RefHeading___Toc218579_4251932518"/></text:h>
      <text:p text:style-name="P18">Andrews RJ, Roche J, Moss WN. ScanFold: an approach for genome-wide discovery of local RNA structural elements-applications to Zika virus and HIV. PeerJ. 2018 Dec 18;6:e6136. doi: 10.7717/peerj.6136. PMID: 30627482; PMCID: PMC6317755.</text:p>
      <text:h text:style-name="P92" text:outline-level="3"><text:bookmark-start text:name="__RefHeading___Toc218579_42519325181"/>How to cite <text:span text:style-name="T128">RNAFold</text:span><text:bookmark-end text:name="__RefHeading___Toc218579_42519325181"/></text:h>
      <text:p text:style-name="P68">R. Lorenz, S.H. Bernhart, C. Hoener zu Siederdissen, H. Tafer, C. Flamm, P.F. Stadler and I.L. Hofacker (2011), "ViennaRNA Package 2.0", Algorithms for Molecular Biology: 6:26</text:p>
      <text:p text:style-name="P14"/>
      <text:p text:style-name="P3"/>
      <text:p text:style-name="P3"/>
      <text:h text:style-name="Heading_20_2" text:outline-level="2" text:is-list-header="true"><text:bookmark-start text:name="__RefHeading___Toc218581_4251932518"/><text:soft-page-break/><text:span text:style-name="T124">2. </text:span>Background<text:bookmark-end text:name="__RefHeading___Toc218581_4251932518"/></text:h>
      <text:h text:style-name="P93" text:outline-level="3"><text:bookmark-start text:name="__RefHeading___Toc218585_4251932518"/>Thermodynamic Z-Score<text:bookmark-end text:name="__RefHeading___Toc218585_4251932518"/></text:h>
      <text:p text:style-name="P11">The primary metric used to interpret ScanFold results is an occurrence-normalized thermodynamic z-score<text:span text:style-name="T9">1</text:span>. A brief explanation is given here on how this score is calculated.</text:p>
      <text:p text:style-name="P11">The thermodynamic z-score is a metric designed to interpret to what degree dinucleotide ordering impacts structural stability, which has been shown to perform more reliably than minimum free energy<text:span text:style-name="T16"> (MFE)</text:span> alone<text:span text:style-name="T9">1</text:span>. A thermodynamic z-score is calculated for a given structure with a predicted (or measured) MFE by generating an ensemble of sequences large enough to have statistical significance (ScanFold uses 100), where each sequence is a copy of the input sequence that has been shuffled so as to preserve dinucleotide frequency<text:span text:style-name="T10">2</text:span><text:span text:style-name="T16">. Each of these sequences has a structure and associated MFE predicted using the Zuker Algorithm</text:span><text:span text:style-name="T10">3,4</text:span><text:span text:style-name="T18">. These MFEs are used to construct a normal curve, and a z-score (the number of standard deviations above/below the mean) is calculated for the input sequence. Negative z-scores are more likely than would be expected of a random ordering of those dinucleotides, suggesting higher order structures which influence stability.</text:span></text:p>
      <text:p text:style-name="P25"><text:span text:style-name="T18">I</text:span><text:span text:style-name="T17">t is important to note that ScanFold generates a z-score on a per-pair basis using the method described below. Unpaired nucleotides may have an associated z-score as well. This is calculated in the same way, and should be interpreted as the degree to which that nucleotide being paired disrupts structure</text:span><text:span text:style-name="T42">, and provides information about the structural ensemble</text:span><text:span text:style-name="T17">. A <text:s/>non-scored unpaired nucleotide is one that was </text:span><text:span text:style-name="T43">simply </text:span><text:span text:style-name="T17">out-competed for all possible pairs</text:span><text:span text:style-name="T43"> by other nucleotides</text:span><text:span text:style-name="T17">, and is not as informative.</text:span></text:p>
      <text:h text:style-name="P94" text:outline-level="3"><text:bookmark-start text:name="__RefHeading___Toc218587_4251932518"/><text:span text:style-name="T18">S</text:span><text:span text:style-name="T17">canFold Algorithm</text:span><text:bookmark-end text:name="__RefHeading___Toc218587_4251932518"/></text:h>
      <text:p text:style-name="P13"><text:span text:style-name="T18">T</text:span><text:span text:style-name="T17">he ScanFold algorithm consists of two steps. The first step, henceforth referred to as </text:span><text:span text:style-name="T20">Scan</text:span><text:span text:style-name="T23">, generates a list of folded windows generated from the input sequence, with an associated score for each window. The second step, henceforth referred to as </text:span><text:span text:style-name="T20">Fold</text:span><text:span text:style-name="T23">, </text:span><text:span text:style-name="T41">generates a normalized z-score for each observed pairing (where unpaired nucleotides are represented as pairing to themselves)</text:span></text:p>
      <text:p text:style-name="P13"><text:span text:style-name="T18">S</text:span><text:span text:style-name="T17">can</text:span><text:span text:style-name="T45"> </text:span><text:span text:style-name="T17">takes a windowed approach to calculating these scores. The input sequence is split up into a number of windows of a certain size (default 120 nucleotides), each of which has its first nucleotide separated by a given step size from the last (default 1, so that each nucleotide marks the beginning of a window until the window reaches the end of the input sequence). The sequence within these windows is folded</text:span><text:span text:style-name="T44"> to generate an MFE. In the original iteration of ScanFold</text:span><text:span text:style-name="T11">5</text:span><text:span text:style-name="T45">, this sequence was then shuffled 100 times preserving dinucleotide frequency, with each shuffled sequence being refolded in order to generate a z-score for the original sequence as described above in the section </text:span><text:span text:style-name="T21">Thermodynamic Z-Score</text:span><text:span text:style-name="T24">. </text:span><text:span text:style-name="T25">ScanFold2</text:span><text:span text:style-name="T13">6</text:span><text:span text:style-name="T26"> introduced a machine learning algorithm trained to predict a mean and standard deviation for the normal curve of MFEs for a given sequence in order to speed up the Scan step of the algorithm, so folding is no longer explicitly performed.</text:span><text:span text:style-name="T29"> This algorithm was trained on sequences with lengths between 20 and 200 nucleotides, window lengths outside this range </text:span><text:span text:style-name="T30">may</text:span><text:span text:style-name="T29"> give erroneous results.</text:span></text:p>
      <text:p text:style-name="P47"><text:soft-page-break/><text:span text:style-name="T29">S</text:span><text:span text:style-name="T22">canFold uses an optimized Zuker algorithm implemented in RNAFold</text:span><text:span text:style-name="T12">4</text:span><text:span text:style-name="T22"> to predict structure and MFE for each window, which has a time complexity of O(n</text:span><text:span text:style-name="T12">3</text:span><text:span text:style-name="T22">) with respect to sequence length. This folding is done roughly once per nucleotide with the default step size of one. Since the sequence length is a fixed value the Scan </text:span><text:span text:style-name="T37">algorithm</text:span><text:span text:style-name="T22"> technically </text:span><text:span text:style-name="T36">scales to O(</text:span><text:span text:style-name="T39">L</text:span><text:span text:style-name="T36">)</text:span><text:span text:style-name="T38"> where </text:span><text:span text:style-name="T39">L</text:span><text:span text:style-name="T38"> is the length of the input sequence</text:span><text:span text:style-name="T22">, though this is scaled by a large constant factor: by default 120</text:span><text:span text:style-name="T12">3</text:span><text:span text:style-name="T22">, or ~1.7 million</text:span><text:span text:style-name="T33">, so in practice the scanning step is usually going to be the slower of the two</text:span><text:span text:style-name="T34"> except on very large input sequences</text:span><text:span text:style-name="T35">.</text:span></text:p>
      <text:p text:style-name="P26"><text:span text:style-name="T26">W</text:span><text:span text:style-name="T22">indow-based data from Scan, stored as a tsv file in the root directory ScanFold was called from, is read by the Fold step. The Fold step constructs a base-pair matrix and stores summed data for the z-score and other metrics (see: Usage) as well as the number of times that pairing occurred. Unpaired nucleotides are represented as a nucleotide pairing to itself.</text:span><text:span text:style-name="T27"> To save space not all possible nucleotides are explicitly stored, instead only one windows length from the diagonal of the matrix is stored and attempts to access pairs outside of this will return an error. </text:span></text:p>
      <text:p text:style-name="P44"><text:span text:style-name="T46">W</text:span><text:span text:style-name="T17">hen all data is read in, each pair has a coverage-normalized z-score calculated</text:span><text:span text:style-name="T47"> as described by Andrews et al</text:span><text:span text:style-name="T14">5</text:span><text:span text:style-name="T17">, which is used as the basis for the rest of Fold and is considered the most informative metric. </text:span><text:span text:style-name="T19">Coverage-normalized z-scores are calculated using the following method:</text:span><text:span text:style-name="T17"> the z-score of all windows a pair is stored within is summed together and divided by the number of windows </text:span><text:span text:style-name="T48">the first nucleotide in a pair</text:span><text:span text:style-name="T17"> may have been found within. This will be either the window size (default 120) or the distance from the end of the sequence if within one window-length of the end. </text:span></text:p>
      <text:p text:style-name="P46"><text:span text:style-name="T28">Z-scores involving nucleotides within one windows length of the start or beginning of the sequence are less reliable, and it is recommended to either disregard these or double check with another algorithm or a smaller window length.</text:span></text:p>
      <text:h text:style-name="Heading_20_3" text:outline-level="3"><text:bookmark-start text:name="__RefHeading___Toc218589_4251932518"/><text:span text:style-name="T49">S</text:span><text:span text:style-name="T17">tructure determination</text:span><text:bookmark-end text:name="__RefHeading___Toc218589_4251932518"/></text:h>
      <text:p text:style-name="P109"><text:span text:style-name="T22">The base pair predictions made by ScanFold tend to be sparse, in that in general each nucleotide is usually only observed with a small number of possible pairs across window. However, most nucleotides still have some form of competition between different pairing targets (or being unpaired). To resolve this and give one optimal structure, Fold uses a greedy approximation algorithm to choose the best base pairs, pairing each nucleotide with at most one other target (or leaving it unpaired), from most to least negative until all bases have been paired or explicitly left unpaired. </text:span><text:span text:style-name="T31">This was chosen as determining the minimum perfect weighted matching is computationally expensive, and a greedy approximation gives results very close to the minimum perfect weighted matching (as expected to the sparsity of graphs formed by </text:span><text:span text:style-name="T32">observed</text:span><text:span text:style-name="T31"> pairs</text:span><text:span text:style-name="T32"> across windows</text:span><text:span text:style-name="T31">). </text:span></text:p>
      <text:p text:style-name="P109"><text:span text:style-name="T40"/></text:p>
      <text:p text:style-name="P109"><text:span text:style-name="T40"/></text:p>
      <text:h text:style-name="Heading_20_3" text:outline-level="3"><text:bookmark-start text:name="__RefHeading___Toc218591_4251932518"/><text:soft-page-break/><text:span text:style-name="T74">Speed</text:span> Considerations<text:bookmark-end text:name="__RefHeading___Toc218591_4251932518"/></text:h>
      <text:p text:style-name="P110"><text:span text:style-name="T51">The slowest step in resolving conflicting base pairs is sorting the list of all possible pairs. </text:span><text:span text:style-name="T52">This is done using the std::sort() function included in the C++ standard library, which implements the Introsort algorithm</text:span><text:span text:style-name="T15">7</text:span><text:span text:style-name="T53">. Introsort chooses the most applicable of Quicksort</text:span><text:span text:style-name="T15">8</text:span><text:span text:style-name="T53">, Heapsort</text:span><text:span text:style-name="T15">9</text:span><text:span text:style-name="T53">, or Insertion Sort</text:span><text:span text:style-name="T15">10</text:span><text:span text:style-name="T53">.</text:span><text:span text:style-name="T58"> This has an average and worst case time complexity of O(</text:span><text:span text:style-name="T60">m</text:span><text:span text:style-name="T58">log</text:span><text:span text:style-name="T60">m</text:span><text:span text:style-name="T58">)</text:span><text:span text:style-name="T59"> where </text:span><text:span text:style-name="T60">m</text:span><text:span text:style-name="T59"> is the set of all scanned pairs</text:span><text:span text:style-name="T58">, which is the theoretical time complexity of the Fold step. In practice formulating output may require parsing the set of all base pairs in the final structure multiple time and can add significant overhead. </text:span><text:span text:style-name="T60">Another consideration is</text:span><text:span text:style-name="T61"> that while typically only a small subset of all possible pairs are found, meaning m</text:span>≈<text:span text:style-name="T61">L where m is all scanned pairs and L is the length of the input sequence, in the worst case scenario m=L</text:span><text:span text:style-name="T89">w</text:span><text:span text:style-name="T62">/2</text:span><text:span text:style-name="T61">, where w is window length (default 120). </text:span><text:span text:style-name="T63">As this would require that each nucleotide can pair to half of all other nucleotides in its window (RNAFold</text:span><text:span text:style-name="T64"> under default settings</text:span><text:span text:style-name="T63"> only allows canonical and wobble pairs</text:span><text:span text:style-name="T64"> so a higher degree of pairing than this is not possible</text:span><text:span text:style-name="T90">, no </text:span><text:span text:style-name="T92">base</text:span><text:span text:style-name="T90"> can pair to </text:span><text:span text:style-name="T91">another of its</text:span><text:span text:style-name="T93"> own</text:span><text:span text:style-name="T91"> type</text:span><text:span text:style-name="T63">)</text:span><text:span text:style-name="T65">, and for sequence order to have little to no impact on possible pairing, it is unlikely to occur outside of circumstances such as very long stretches of AT repeats.</text:span><text:span text:style-name="T66"> </text:span><text:span text:style-name="T94">W</text:span><text:span text:style-name="T66">e </text:span><text:span text:style-name="T67">have observed in testing</text:span><text:span text:style-name="T94"> on </text:span><text:span text:style-name="T95">the EBV genome</text:span><text:span text:style-name="T66"> that m is at most several times the size of L</text:span><text:span text:style-name="T68"> and that the time complexity of Fold is fairly consistent with respect to sequence length.</text:span></text:p>
      <text:p text:style-name="P108"><draw:frame draw:style-name="fr1" draw:name="Frame1" text:anchor-type="char" svg:width="6.9252in" draw:z-index="0"><draw:text-box fo:min-height="5.4634in"><text:p text:style-name="Figure"><draw:frame draw:style-name="fr2" draw:name="Image1" text:anchor-type="paragraph" svg:width="6.9252in" style:rel-width="100%" svg:height="5.4634in" style:rel-height="scale" draw:z-index="1"><draw:image xlink:href="Pictures/1000000000000363000002AC12D31D6BAFB1756E.png" xlink:type="simple" xlink:show="embed" xlink:actuate="onLoad" draw:mime-type="image/png"/></draw:frame>Figure <text:sequence text:ref-name="refFigure0" text:name="Figure" text:formula="ooow:Figure+1" style:num-format="1">1</text:sequence>: Benchmarking of <text:span text:style-name="T72">the Fold step (algorithm only) for </text:span>ScanFold<text:span text:style-name="T69">2</text:span><text:span text:style-name="T71"> (blue)</text:span> and ScanFold<text:span text:style-name="T69">3</text:span><text:span text:style-name="T73"> (orange, gray, yellow)</text:span>. ScanFold3 was tested with 3 algorithms, the release version uses a greedy approximation algorithm<text:span text:style-name="T70"> (orange)</text:span><text:span text:style-name="T87"> due to large increase in speed while still finding a near-</text:span><text:span text:style-name="T88">minimum</text:span><text:span text:style-name="T87"> matching</text:span>. <text:span text:style-name="T75">The Flow algorithm is a minimum-cost flow algorithm using the shorter path faster algorithm (SPFA). </text:span><text:span text:style-name="T76">The Blossom algorithm is Edmonds' Blossom Algorithm, </text:span><text:span text:style-name="T77">tested </text:span><text:span text:style-name="T76">using the Boost C++ package.</text:span><text:span text:style-name="T78"> The dataset consisted</text:span><text:span text:style-name="T79"> sequences</text:span><text:span text:style-name="T78"> of the first n nucleotides of the Epstein-Barr Virus </text:span><text:span text:style-name="T80">1 </text:span><text:span text:style-name="T81">reference </text:span><text:span text:style-name="T78">genome, where n was a range of values from 500 to 4000.</text:span><text:span text:style-name="T82"> Testing was done for the entire genome but not shown here </text:span><text:span text:style-name="T83">due to </text:span><text:span text:style-name="T84">excessive memory usage</text:span><text:span text:style-name="T83"> in the Flow and Blossom algorithms on larger sequence lengths</text:span><text:span text:style-name="T85"> causing </text:span><text:span text:style-name="T86">the program to fail</text:span><text:span text:style-name="T83">.</text:span></text:p></draw:text-box></draw:frame><text:soft-page-break/></text:p>
      <text:p text:style-name="P51"><text:tab/></text:p>
      <text:h text:style-name="Heading_20_2" text:outline-level="2"><text:soft-page-break/></text:h>
      <text:h text:style-name="Heading_20_2" text:outline-level="2"><text:bookmark-start text:name="__RefHeading___Toc218593_4251932518"/><text:span text:style-name="T124">3. </text:span>Requirements<text:bookmark-end text:name="__RefHeading___Toc218593_4251932518"/></text:h>
      <text:h text:style-name="Heading_20_3" text:outline-level="3"><text:bookmark-start text:name="__RefHeading___Toc218595_4251932518"/>To run<text:bookmark-end text:name="__RefHeading___Toc218595_4251932518"/></text:h>
      <text:p text:style-name="P53">Debian-based Operating System</text:p>
      <text:p text:style-name="P54"><text:tab/>Recommend Ubuntu 2<text:span text:style-name="T97">2</text:span>+</text:p>
      <text:p text:style-name="P51">Anaconda <text:span text:style-name="T96">29+</text:span></text:p>
      <text:p text:style-name="P55">At least <text:span text:style-name="T98">7</text:span>G of disc space</text:p>
      <text:p text:style-name="P70"/>
      <text:p text:style-name="P70"><text:span text:style-name="T102">*</text:span>ScanFold3 does NOT<text:span text:style-name="T147"> currently</text:span> have Windows support<text:span text:style-name="T148">, though it is planned for the full release. </text:span>If necessary, for help getting ScanFold3 to work on Windows contact us over email or Github<text:span text:style-name="T125"> (see page 1 for contact information)</text:span>.<text:span text:style-name="T103"> We cannot assist in getting ScanFold3 to work on MacOS.</text:span></text:p>
      <text:h text:style-name="Heading_20_3" text:outline-level="3"><text:bookmark-start text:name="__RefHeading___Toc218597_4251932518"/>To compile<text:span text:style-name="T104"> (optional)</text:span><text:bookmark-end text:name="__RefHeading___Toc218597_4251932518"/></text:h>
      <text:p text:style-name="P51">CMake 3.15+</text:p>
      <text:p text:style-name="P51">PyBind11 2.13+</text:p>
      <text:p text:style-name="P52">GCC Version 8 or later</text:p>
      <text:h text:style-name="P87" text:outline-level="2" text:is-list-header="true"><text:bookmark-start text:name="__RefHeading___Toc218599_4251932518"/><text:span text:style-name="T124">4. </text:span>Installation<text:bookmark-end text:name="__RefHeading___Toc218599_4251932518"/></text:h>
      <text:p text:style-name="P69">ScanFold3 uses <text:span text:style-name="T101">Conda</text:span> to install dependencies. The <text:span text:style-name="T101">Conda</text:span> environment can be created using the following steps:</text:p>
      <text:p text:style-name="P12">1. Download ScanFold3 from github (https://github.com/moss-lab/ScanFold3) to the desired folder</text:p>
      <text:p text:style-name="P12">2. <text:span text:style-name="T101">Open a terminal and n</text:span>avigate to the env directory in ScanFold3 and install the conda environment from ScanFold3.yml using the following command:</text:p>
      <text:p text:style-name="P56"><text:tab/>conda install -f ScanFold3.yml</text:p>
      <text:p text:style-name="P56">3. <text:span text:style-name="T99">When prompted, enter </text:span><text:span text:style-name="T100">"y"</text:span></text:p>
      <text:p text:style-name="P57">In order to run ScanFold3, the Conda environment must be active. This can be done using the command:</text:p>
      <text:p text:style-name="P57"><text:tab/>conda activate ScanFold3</text:p>
      <text:p text:style-name="P57"><text:soft-page-break/>This only needs to be done once per session. In order to run ScanFold3 in a new terminal you must activate the environment in it.</text:p>
      <text:h text:style-name="Heading_20_3" text:outline-level="3"><text:bookmark-start text:name="__RefHeading___Toc218601_4251932518"/>Compiling<text:span text:style-name="T105"> ScanFold3</text:span><text:bookmark-end text:name="__RefHeading___Toc218601_4251932518"/></text:h>
      <text:p text:style-name="P71"><text:span text:style-name="T107">ScanFold3 does not need to be compiled if you are using a compatible Debian-based operating system. If you are using a non-Debian OS or an old Debian OS, you may need to </text:span><text:span text:style-name="T108">re</text:span><text:span text:style-name="T112">-</text:span><text:span text:style-name="T107">compile ScanFold3's libraries in order for it to work. </text:span><text:span text:style-name="T109">If you encounter errors, particularly </text:span><text:span text:style-name="T110">those caused by </text:span><text:span text:style-name="T109">C++ name mangling</text:span><text:span text:style-name="T111"> (ImportError: undefined symbol: ...)</text:span><text:span text:style-name="T109">, re</text:span><text:span text:style-name="T113">-</text:span><text:span text:style-name="T109">compiling may fix them.</text:span><text:span text:style-name="T111"> </text:span></text:p>
      <text:p text:style-name="P58">In order<text:span text:style-name="T104"> to compile</text:span><text:span text:style-name="T106"> ScanFold3, </text:span><text:span text:style-name="T114">first </text:span><text:span text:style-name="T106">ensure you have installed the requirements </text:span><text:span text:style-name="T122">listed in </text:span><text:span text:style-name="T55">Requirements: To compile</text:span><text:span text:style-name="T106">. </text:span><text:span text:style-name="T114">Then f</text:span><text:span text:style-name="T106">ollow these steps</text:span><text:span text:style-name="T114">:</text:span></text:p>
      <text:p text:style-name="P59">1. In the ScanFold3 root directory, which contains the file CMakeLists.txt<text:span text:style-name="T115">, create and navigate to a directory named "build":</text:span></text:p>
      <text:p text:style-name="P60"><text:tab/>mkdir build </text:p>
      <text:p text:style-name="P60"><text:tab/>cd build </text:p>
      <text:p text:style-name="P60">2. In this directory, run the following command<text:span text:style-name="T116">s</text:span>:</text:p>
      <text:p text:style-name="P60"><text:tab/>cmake ..</text:p>
      <text:p text:style-name="P61"><text:tab/>make</text:p>
      <text:p text:style-name="P61">3. <text:span text:style-name="T117">Navigate back to the ScanFold3 directory. (Optional) delete the build directory:</text:span></text:p>
      <text:p text:style-name="P62"><text:tab/>cd ..</text:p>
      <text:p text:style-name="P62"><text:tab/>rm -r build </text:p>
      <text:h text:style-name="Heading_20_3" text:outline-level="3"><text:bookmark-start text:name="__RefHeading___Toc218603_4251932518"/>Troubleshooting<text:span text:style-name="T124"> Installation</text:span><text:bookmark-end text:name="__RefHeading___Toc218603_4251932518"/></text:h>
      <text:p text:style-name="P63">If you are encountering errors running ScanFold3, try the following:</text:p>
      <text:p text:style-name="P63">1. Ensure the Conda environment is active</text:p>
      <text:p text:style-name="P63">2. Check Github for any updates</text:p>
      <text:p text:style-name="P64"><text:span text:style-name="T120">3.</text:span> Double check your input files to ensure they are the proper format, with no empty lines or invisible characters. If the file was created in Windows, you may need to <text:a xlink:type="simple" xlink:href="https://www.geeksforgeeks.org/linux-unix/dos2unix-unix2dos-commands/" text:style-name="Internet_20_link" text:visited-style-name="Visited_20_Internet_20_Link">convert the file to Unix</text:a>. </text:p>
      <text:p text:style-name="P65">4. <text:span text:style-name="T121">Re-c</text:span><text:span text:style-name="T118">ompile ScanFold3's libraries (see</text:span><text:span text:style-name="T119"> </text:span><text:span text:style-name="T56">Installation</text:span><text:span text:style-name="T57">:</text:span><text:span text:style-name="T55"> </text:span><text:span text:style-name="T56">Compiling ScanFold3</text:span><text:span text:style-name="T119">)</text:span></text:p>
      <text:p text:style-name="P66">5. Delete the ScanFold3 environment and re-create it (this may be necessary if you accidentally update the environment<text:span text:style-name="T123">)</text:span></text:p>
      <text:p text:style-name="P67">6. Check to ensure that the Conda environment is name correctly using the command:</text:p>
      <text:p text:style-name="P67"><text:soft-page-break/><text:tab/>conda env list</text:p>
      <text:p text:style-name="P67"><text:s text:c="4"/>If it is not named ScanFold3, use the name listed here instead when activating the environment.</text:p>
      <text:h text:style-name="P88" text:outline-level="2"><text:soft-page-break/></text:h>
      <text:h text:style-name="P88" text:outline-level="2" text:is-list-header="true"/>
      <text:h text:style-name="P88" text:outline-level="2"/>
      <text:h text:style-name="P88" text:outline-level="2"/>
      <text:h text:style-name="P88" text:outline-level="2"/>
      <text:h text:style-name="P88" text:outline-level="2"/>
      <text:h text:style-name="P88" text:outline-level="2"/>
      <text:h text:style-name="P88" text:outline-level="2"/>
      <text:h text:style-name="P88" text:outline-level="2"/>
      <text:h text:style-name="P88" text:outline-level="2"/>
      <text:h text:style-name="P88" text:outline-level="2"/>
      <text:h text:style-name="P88" text:outline-level="2"/>
      <text:h text:style-name="P88" text:outline-level="2"/>
      <text:h text:style-name="P88" text:outline-level="2"/>
      <text:h text:style-name="P88" text:outline-level="2"/>
      <text:h text:style-name="P88" text:outline-level="2"/>
      <text:h text:style-name="P88" text:outline-level="2"/>
      <text:h text:style-name="P88" text:outline-level="2"/>
      <text:h text:style-name="P88" text:outline-level="2"><text:bookmark-start text:name="__RefHeading___Toc42712_3640823107"/><text:soft-page-break/>5. Usage<text:bookmark-end text:name="__RefHeading___Toc42712_3640823107"/></text:h>
      <text:h text:style-name="P95" text:outline-level="3"><text:bookmark-start text:name="__RefHeading___Toc42714_3640823107"/>Running ScanFold<text:bookmark-end text:name="__RefHeading___Toc42714_3640823107"/></text:h>
      <text:p text:style-name="P75">1. Ensure the conda environment created during installation is active. If using default installation, use this command:</text:p>
      <text:p text:style-name="P75"><text:tab/>conda activate ScanFold3</text:p>
      <text:p text:style-name="P75">2. Run ScanFold using a fasta file input with the following command, with the path to where your fasta file and the ScanFold directory:</text:p>
      <text:p text:style-name="P75"><text:tab/>python /path/to/ScanFold.py <text:span text:style-name="T140">your_sequence</text:span>.fasta</text:p>
      <text:p text:style-name="P77">ScanFold-Scan and ScanFold-Fold can optionally be run alone. ScanFold-Scan will produce only a .tsv file containing window data as an output. ScanFold-Fold must take a .tsv file in that format as an input.</text:p>
      <text:p text:style-name="P78">To run ScanFold-Scan alone:</text:p>
      <text:p text:style-name="P78"><text:tab/><text:span text:style-name="T129">python /path/to/ScanFold</text:span>Scan<text:span text:style-name="T129">.py </text:span><text:span text:style-name="T140">your_sequence</text:span><text:span text:style-name="T129">.fasta</text:span></text:p>
      <text:p text:style-name="P78">To run ScanFold-Fold alone:</text:p>
      <text:p text:style-name="P78"><text:tab/><text:span text:style-name="T129">python /path/to/ScanFold</text:span>Fold<text:span text:style-name="T129">.py</text:span> <text:span text:style-name="T140">your_sequence</text:span><text:span text:style-name="T129">.fasta</text:span> --tsv scan_output.tsv</text:p>
      <text:p text:style-name="P79">In the case that you have multiple sequences in one fasta, one .tsv must be given for each sequence. Ensure headers in the fasta match with the name of the .tsv file given; everything before the first "." in the .tsv file name must be the same as the header for its respective sequence. Headers that contain a "." will cause an error.</text:p>
      <text:p text:style-name="P80">Example<text:span text:style-name="T141"> (two sequence)</text:span>:</text:p>
      <text:p text:style-name="P80"><text:tab/><text:span text:style-name="T129">python /path/to/ScanFold</text:span><text:span text:style-name="T139">Fold</text:span><text:span text:style-name="T129">.py</text:span><text:span text:style-name="T139"> </text:span><text:span text:style-name="T140">your_sequence</text:span><text:span text:style-name="T129">.fasta</text:span><text:span text:style-name="T139"> --tsv </text:span>header_1<text:span text:style-name="T139">.tsv</text:span> header_2<text:span text:style-name="T139">.tsv</text:span></text:p>
      <text:h text:style-name="P96" text:outline-level="3" text:is-list-header="true"><text:bookmark-start text:name="__RefHeading___Toc42716_3640823107"/>Flags (optional)<text:bookmark-end text:name="__RefHeading___Toc42716_3640823107"/></text:h>
      <text:h text:style-name="P97" text:outline-level="4"><text:bookmark-start text:name="__RefHeading___Toc42718_3640823107"/>I/O<text:bookmark-end text:name="__RefHeading___Toc42718_3640823107"/></text:h>
      <text:p text:style-name="P76"><text:span text:style-name="T130">--folder_name</text:span><text:tab/></text:p>
      <text:p text:style-name="P76"><text:tab/>Name of output folder (defaults to date/time)</text:p>
      <text:p text:style-name="P27">--extract</text:p>
      <text:p text:style-name="P76"><text:span text:style-name="T130"><text:tab/></text:span><text:span text:style-name="T131">Extract structures from minus 1 or minus 2 dbn file (2 or 1); Default = 1</text:span></text:p>
      <text:p text:style-name="P27">--tsv</text:p>
      <text:p text:style-name="P76"><text:tab/><text:span text:style-name="T144">I</text:span>nput tsv name from ScanFold-Scan (<text:span text:style-name="T146">Only when directly running </text:span>ScanFoldFold.py)<text:tab/></text:p>
      <text:p text:style-name="P27"><text:soft-page-break/>--id</text:p>
      <text:p text:style-name="P45"><text:span text:style-name="T142"><text:tab/></text:span>Name or ID of sequence being analyzed<text:span text:style-name="T143"> (d</text:span>efault "UserInput<text:span text:style-name="T142">"</text:span><text:span text:style-name="T143">)</text:span></text:p>
      <text:p text:style-name="P27">--es_path</text:p>
      <text:p text:style-name="P28"><text:span text:style-name="T131"><text:tab/></text:span><text:span text:style-name="T135">N</text:span><text:span text:style-name="T131">ame of extracted structures file</text:span><text:span text:style-name="T133"> (d</text:span><text:span text:style-name="T132">efault "extracted_structures"</text:span><text:span text:style-name="T133">)</text:span></text:p>
      <text:p text:style-name="P28">--igv_path</text:p>
      <text:p text:style-name="P29"><text:span text:style-name="T131"><text:tab/></text:span><text:span text:style-name="T135">N</text:span><text:span text:style-name="T131">ame of IGV file</text:span><text:span text:style-name="T133"> (d</text:span><text:span text:style-name="T131">efault "igv_files"</text:span><text:span text:style-name="T133">)</text:span></text:p>
      <text:p text:style-name="P29">--inforna_path</text:p>
      <text:p text:style-name="P30"><text:span text:style-name="T131"><text:tab/></text:span><text:span text:style-name="T135">N</text:span><text:span text:style-name="T131">ame of inforna file (default "inforna_structures")</text:span></text:p>
      <text:h text:style-name="P98" text:outline-level="4"><text:bookmark-start text:name="__RefHeading___Toc42720_3640823107"/>Webserver<text:bookmark-end text:name="__RefHeading___Toc42720_3640823107"/></text:h>
      <text:p text:style-name="P81">These arguments are for use in the RNAStructuromeDB web server<text:span text:style-name="T145">, primarily to display data through IGV</text:span>. Most users will not need to use them.</text:p>
      <text:p text:style-name="P30">--logfile</text:p>
      <text:p text:style-name="P31"><text:span text:style-name="T131"><text:tab/>File where logs will be written (default stdout</text:span><text:span text:style-name="T134">)</text:span></text:p>
      <text:p text:style-name="P32">--loglevel</text:p>
      <text:p text:style-name="P32"><text:span text:style-name="T131"><text:tab/></text:span><text:span text:style-name="T135">L</text:span><text:span text:style-name="T131">ogging level, see python logging library for more information on usage. (default "INFO")</text:span></text:p>
      <text:p text:style-name="P32">--webserver</text:p>
      <text:p text:style-name="P100"><text:tab/>If provided, the output folder is compressed into a tar.gz file and written to the path specified by<text:tab/>this parameter</text:p>
      <text:p text:style-name="P33">--fasta_file_path</text:p>
      <text:p text:style-name="P101"><text:tab/>Web server specific fasta file path</text:p>
      <text:p text:style-name="P34">--bp_track</text:p>
      <text:p text:style-name="P101"><text:tab/>Base pair track file, .bp format for use in webserver</text:p>
      <text:p text:style-name="P34">--ed_wig_file_path</text:p>
      <text:p text:style-name="P101"><text:tab/>Ensemble diversity file, .wig format for use in webserver</text:p>
      <text:p text:style-name="P34">--mfe_wig_file_path</text:p>
      <text:p text:style-name="P102"><text:tab/>Minimum free energy file, .wig format for use in webserver</text:p>
      <text:p text:style-name="P35">--pvalue_wig_file_path</text:p>
      <text:p text:style-name="P36"><text:span text:style-name="T131"><text:tab/>P-value</text:span><text:span text:style-name="T136"> file, .wig format for use in webserver</text:span></text:p>
      <text:p text:style-name="P33"><text:soft-page-break/>--zscore_wig_file_path</text:p>
      <text:p text:style-name="P37"><text:span text:style-name="T131"><text:tab/>Thermodynamic z-score</text:span><text:span text:style-name="T136"> file, .wig format for use in webserver</text:span></text:p>
      <text:p text:style-name="P33">--final_partners_wig</text:p>
      <text:p text:style-name="P38"><text:span text:style-name="T131"><text:tab/>Base pairs after filtering for competition</text:span><text:span text:style-name="T136">, .wig format for use in webserver</text:span></text:p>
      <text:h text:style-name="P97" text:outline-level="4"><text:bookmark-start text:name="__RefHeading___Toc42722_3640823107"/>Scan Stage<text:bookmark-end text:name="__RefHeading___Toc42722_3640823107"/></text:h>
      <text:p text:style-name="P39">-s, --step</text:p>
      <text:p text:style-name="P103"><text:tab/>Step size; default = 1</text:p>
      <text:p text:style-name="P40">-w, --window</text:p>
      <text:p text:style-name="P104"><text:tab/>Window size; default = 120</text:p>
      <text:h text:style-name="Heading_20_4" text:outline-level="4"><text:bookmark-start text:name="__RefHeading___Toc42724_3640823107"/>Fold Stage<text:bookmark-end text:name="__RefHeading___Toc42724_3640823107"/></text:h>
      <text:p text:style-name="P41">-f, --filter</text:p>
      <text:p text:style-name="P42"><text:span text:style-name="T131"><text:tab/>Z-score </text:span><text:span text:style-name="T137">value for filtering output, default = -1</text:span></text:p>
      <text:p text:style-name="P43">-c, --competition</text:p>
      <text:p text:style-name="P43"><text:span text:style-name="T131"><text:tab/>Competition determine if each base must pair to one and only one base, or if bases may be<text:tab/><text:tab/></text:span><text:span text:style-name="T138">reported</text:span><text:span text:style-name="T131"> as pairing to multiple other bases (1 for disallow competition, 0 for allow; 1 by default)</text:span></text:p>
      <text:p text:style-name="P43">--global_refold</text:p>
      <text:p text:style-name="P105"><text:tab/>Global refold option. Refold full sequence using Zavg &lt;-1 and &lt;-2 base pairs</text:p>
      <text:p text:style-name="P105"/>
      <text:p text:style-name="P106"/>
      <text:p text:style-name="P106"/>
      <text:p text:style-name="P106"/>
      <text:p text:style-name="P106"/>
      <text:p text:style-name="P106"/>
      <text:p text:style-name="P106"/>
      <text:h text:style-name="P89" text:outline-level="2"><text:bookmark-start text:name="__RefHeading___Toc218605_4251932518"/><text:soft-page-break/>Bibliography<text:bookmark-end text:name="__RefHeading___Toc218605_4251932518"/></text:h>
      <text:p text:style-name="P15"><text:span text:style-name="T16">1. </text:span>Clote P, Ferré F, Kranakis E, Krizanc D. Structural RNA has lower folding energy than random RNA of the same dinucleotide frequency. RNA. 2005 May;11(5):578-91. doi: 10.1261/rna.7220505. PMID: 15840812; PMCID: PMC1370746.</text:p>
      <text:p text:style-name="P15"/>
      <text:p text:style-name="P15"><text:span text:style-name="T16">2. </text:span>Altschul SF, Erickson BW. Significance of nucleotide sequence alignments: a method for random sequence permutation that preserves dinucleotide and codon usage. Mol Biol Evol. 1985 Nov;2(6):526-38. doi: 10.1093/oxfordjournals.molbev.a040370. PMID: 3870875.</text:p>
      <text:p text:style-name="P16"/>
      <text:p text:style-name="P24">3. Lyngs R, Zuker M, Pedersen C. Fast evaluation of internal loops in RNA secondary structure prediction. Bioinformatics. 1999;15(6):440. doi: 10.1093/bioinformatics/15.6.440.</text:p>
      <text:p text:style-name="P19"/>
      <text:p text:style-name="P23">4. Lorenz, R., Bernhart, S.H., Höner zu Siederdissen, C. et al. ViennaRNA Package 2.0. Algorithms Mol Biol 6, 26 (2011). https://doi.org/10.1186/1748-7188-6-26</text:p>
      <text:p text:style-name="P19"/>
      <text:p text:style-name="P74">5. Andrews RJ, Roche J, Moss WN. ScanFold: an approach for genome-wide discovery of local RNA structural elements-applications to Zika virus and HIV. PeerJ. 2018 Dec 18;6:e6136. doi: 10.7717/peerj.6136. PMID: 30627482; PMCID: PMC6317755.</text:p>
      <text:p text:style-name="P22"/>
      <text:p text:style-name="P73">6. Andrews RJ, Rouse WB, O'Leary CA, Booher NJ, Moss WN. ScanFold 2.0: a rapid approach for identifying potential structured RNA targets in genomes and transcriptomes. PeerJ. 2022 Nov 8;10:e14361. doi: 10.7717/peerj.14361. PMID: 36389431; PMCID: PMC9651051.</text:p>
      <text:p text:style-name="P48"><text:span text:style-name="T52">7. </text:span>Musser DR. Introspective sorting and selection algorithms. Software: Practice and Experience. 1997 Aug;27(8):983-93.</text:p>
      <text:p text:style-name="P50"><text:span text:style-name="T53">8. </text:span>Hoare CA. Quicksort. The computer journal. 1962 Jan 1;5(1):10-6.</text:p>
      <text:p text:style-name="P50"><text:span text:style-name="T53">9. </text:span>Williams, J. W. J. (2025). Algorithm 232: Heapsort. Commun. ACM, 7(6), 347–348. https://doi.org/10.1145/512274.3734138 </text:p>
      <text:p text:style-name="P50"><text:span text:style-name="T53">10. </text:span>Kowalk, W.P. (2011). Insertion Sort. In: Vöcking, B., <text:span text:style-name="T54">et al.</text:span> Algorithms Unplugged. Springer, Berlin, Heidelberg. https://doi.org/10.1007/978-3-642-15328-0_2</text:p>
      <text:p text:style-name="P4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gur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1df40" officeooo:paragraph-rsid="0021df40"/>
    </style:style>
    <style:style style:name="MT1" style:family="text">
      <style:text-properties officeooo:rsid="0026cb5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pyright 2025 Moss Lab</text:p>
        <text:p text:style-name="MP1">ScanFold<text:span text:style-name="MT1">3</text:span> is licensed and distributed freely under the MIT license. For a copy of the license see https://mit-license.org/</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7T14:22:18.130772224</meta:creation-date>
    <meta:generator>LibreOffice/7.3.7.2$Linux_X86_64 LibreOffice_project/30$Build-2</meta:generator>
    <dc:date>2025-07-22T15:31:04.662194403</dc:date>
    <meta:editing-duration>PT4H7M17S</meta:editing-duration>
    <meta:editing-cycles>213</meta:editing-cycles>
    <meta:document-statistic meta:table-count="0" meta:image-count="1" meta:object-count="0" meta:page-count="15" meta:paragraph-count="183" meta:word-count="2939" meta:character-count="18830" meta:non-whitespace-character-count="16035"/>
  </office:meta>
</office:document-meta>
</file>